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B0000041AE53C378C.png" manifest:media-type="image/png"/>
  <manifest:file-entry manifest:full-path="Pictures/10000001000005450000041A09D30606.png" manifest:media-type="image/png"/>
  <manifest:file-entry manifest:full-path="Pictures/100000010000000700000010B3F9488D.png" manifest:media-type="image/png"/>
  <manifest:file-entry manifest:full-path="Pictures/100000010000003C00000012A26FDABB.png" manifest:media-type="image/png"/>
  <manifest:file-entry manifest:full-path="Pictures/10000652000000B10000017AE561336A.svg" manifest:media-type="image/svg+xml"/>
  <manifest:file-entry manifest:full-path="Pictures/1000250E00000590000001A72AC5E8A6.svg" manifest:media-type="image/svg+xml"/>
  <manifest:file-entry manifest:full-path="Pictures/100000010000003C00000012389E6B45.png" manifest:media-type="image/png"/>
  <manifest:file-entry manifest:full-path="Pictures/100023700000058B000001A7432967CF.svg" manifest:media-type="image/svg+xml"/>
  <manifest:file-entry manifest:full-path="Pictures/100000010000000F0000000B342C32BB.png" manifest:media-type="image/png"/>
  <manifest:file-entry manifest:full-path="Pictures/100008EF000001670000010202DA53F9.svg" manifest:media-type="image/svg+xml"/>
  <manifest:file-entry manifest:full-path="Pictures/10000001000000100000000B72B59307.png" manifest:media-type="image/png"/>
  <manifest:file-entry manifest:full-path="Pictures/1000224D000005AE000001A9D0196AC3.svg" manifest:media-type="image/svg+xml"/>
  <manifest:file-entry manifest:full-path="Pictures/100009B60000017500000102BA777FA6.svg" manifest:media-type="image/svg+xml"/>
  <manifest:file-entry manifest:full-path="Pictures/10000001000000100000000A9E44A9D7.png" manifest:media-type="image/png"/>
  <manifest:file-entry manifest:full-path="Pictures/10000001000000100000000A367B8988.png" manifest:media-type="image/png"/>
  <manifest:file-entry manifest:full-path="Pictures/100000010000000F0000000B49D762B5.png" manifest:media-type="image/png"/>
  <manifest:file-entry manifest:full-path="Pictures/100000010000003B0000000C479FD445.png" manifest:media-type="image/png"/>
  <manifest:file-entry manifest:full-path="Pictures/10000BE500000175000000E7B222FFCE.svg" manifest:media-type="image/svg+xml"/>
  <manifest:file-entry manifest:full-path="Pictures/100000010000047500000606EF15CB96.png" manifest:media-type="image/png"/>
  <manifest:file-entry manifest:full-path="Pictures/10000001000000360000000A96FE200B.png" manifest:media-type="image/png"/>
  <manifest:file-entry manifest:full-path="Pictures/10000EE700000176000000E7278F6119.svg" manifest:media-type="image/svg+xml"/>
  <manifest:file-entry manifest:full-path="Pictures/1000B69100000000000000006DA8F921.pdf" manifest:media-type="application/pdf"/>
  <manifest:file-entry manifest:full-path="Pictures/100000010000018000000028520E9889.png" manifest:media-type="image/png"/>
  <manifest:file-entry manifest:full-path="Pictures/100000010000003900000012FBF6CA27.png" manifest:media-type="image/png"/>
  <manifest:file-entry manifest:full-path="Pictures/10000D13000001DD000001553599030A.svg" manifest:media-type="image/svg+xml"/>
  <manifest:file-entry manifest:full-path="Pictures/10000001000004A0000000C8ACA3E62C.png" manifest:media-type="image/png"/>
  <manifest:file-entry manifest:full-path="Pictures/100000010000005700000022F3B42B47.png" manifest:media-type="image/png"/>
  <manifest:file-entry manifest:full-path="Pictures/1000000100000035000000096D1DCF2C.png" manifest:media-type="image/png"/>
  <manifest:file-entry manifest:full-path="Pictures/100065AD00000000000000000403F9E1.pdf" manifest:media-type="application/pdf"/>
  <manifest:file-entry manifest:full-path="Pictures/10001C9C0000057300000127B9E22244.svg" manifest:media-type="image/svg+xml"/>
  <manifest:file-entry manifest:full-path="Pictures/TablePreview1.svm" manifest:media-type=""/>
  <manifest:file-entry manifest:full-path="Pictures/10000EBC0000015D00000100F25F0BC5.svg" manifest:media-type="image/svg+xml"/>
  <manifest:file-entry manifest:full-path="Pictures/10000001000001550000015DBAE51BF3.png" manifest:media-type="image/png"/>
  <manifest:file-entry manifest:full-path="Pictures/1000F6A10000239B000003AD48D7B5DF.svg" manifest:media-type="image/svg+xml"/>
  <manifest:file-entry manifest:full-path="Pictures/100019C000000470000000EC214EC7F3.svg" manifest:media-type="image/svg+xml"/>
  <manifest:file-entry manifest:full-path="Pictures/10003BE10000080F00000321990DD6FD.svg" manifest:media-type="image/svg+xml"/>
  <manifest:file-entry manifest:full-path="Pictures/100000010000000A0000000AE273F221.png" manifest:media-type="image/png"/>
  <manifest:file-entry manifest:full-path="Pictures/10000891000000F7000000EE23E5DC56.svg" manifest:media-type="image/svg+xml"/>
  <manifest:file-entry manifest:full-path="Pictures/10000001000000140000000EF4D08EBF.png" manifest:media-type="image/png"/>
  <manifest:file-entry manifest:full-path="Pictures/10000562000000B0000000E7DA4468C4.svg" manifest:media-type="image/svg+xml"/>
  <manifest:file-entry manifest:full-path="Pictures/10000001000000070000000A11791A97.png" manifest:media-type="image/png"/>
  <manifest:file-entry manifest:full-path="Pictures/10001E3B0000053F000001A9B38077F5.svg" manifest:media-type="image/svg+xml"/>
  <manifest:file-entry manifest:full-path="Pictures/1000215B000004FA000000ECAC702237.svg" manifest:media-type="image/svg+xml"/>
  <manifest:file-entry manifest:full-path="Pictures/100017E1000003E8000000EC5C280E6C.svg" manifest:media-type="image/svg+xml"/>
  <manifest:file-entry manifest:full-path="Pictures/1000000000000780000004DA543A29EA.jpg" manifest:media-type="image/jpeg"/>
  <manifest:file-entry manifest:full-path="Pictures/10000CBB0000014600000127E1AC8678.svg" manifest:media-type="image/svg+xml"/>
  <manifest:file-entry manifest:full-path="Pictures/100000010000000E0000000C7B3A37EE.png" manifest:media-type="image/png"/>
  <manifest:file-entry manifest:full-path="Pictures/1000000000000FC000000BD0A5BC78A8.jpg" manifest:media-type="image/jpeg"/>
  <manifest:file-entry manifest:full-path="Pictures/100000010000002A0000000A3956CE18.png" manifest:media-type="image/png"/>
  <manifest:file-entry manifest:full-path="Pictures/100000010000047500000606EBD16441.png" manifest:media-type="image/png"/>
  <manifest:file-entry manifest:full-path="Pictures/100000010000003D00000012EE52D9C2.png" manifest:media-type="image/png"/>
  <manifest:file-entry manifest:full-path="Pictures/10000001000000300000000A074C679D.png" manifest:media-type="image/png"/>
  <manifest:file-entry manifest:full-path="Pictures/100020B1000004E2000000D196DC0FD0.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19.025cm" fo:min-width="12.425cm" fo:padding-top="0.252cm" fo:padding-bottom="0.252cm" fo:padding-left="0.377cm" fo:padding-right="0.377cm" draw:shadow-opacity="0%" loext:decorative="false"/>
    </style:style>
    <style:style style:name="gr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0.493cm" fo:min-width="33.578cm" fo:padding-top="0.231cm" fo:padding-bottom="0.231cm" fo:padding-left="0.356cm" fo:padding-right="0.356cm" loext:decorative="false"/>
    </style:style>
    <style:style style:name="gr4" style:family="graphic" style:parent-style-name="standard">
      <style:graphic-properties svg:stroke-color="#ffffff" draw:fill-color="#ffffff" draw:textarea-horizontal-align="justify" draw:textarea-vertical-align="middle" draw:auto-grow-height="false" fo:min-height="1.975cm" fo:min-width="26.17cm" style:writing-mode="lr-tb" loext:decorative="false"/>
      <style:paragraph-properties style:writing-mode="lr-tb"/>
    </style:style>
    <style:style style:name="gr5"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2.45cm" fo:min-width="121.42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fill="none" draw:fill-color="#6b000d" loext:fill-use-slide-background="false" draw:textarea-horizontal-align="justify" draw:textarea-vertical-align="middle" draw:auto-grow-height="false" fo:min-height="4.195cm" fo:min-width="121.42cm" loext:decorative="false"/>
    </style:style>
    <style:style style:name="gr8" style:family="graphic" style:parent-style-name="standard">
      <style:graphic-properties draw:stroke="none" svg:stroke-color="#000000" draw:fill="none" draw:fill-color="#ffffff" draw:auto-grow-height="true" draw:auto-grow-width="false" fo:max-height="0cm" fo:min-height="3.777cm" loext:decorative="false"/>
      <style:paragraph-properties style:writing-mode="lr-tb"/>
    </style:style>
    <style:style style:name="gr9"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4.333cm" fo:min-width="33.644cm" fo:padding-top="0.231cm" fo:padding-bottom="0.231cm" fo:padding-left="0.356cm" fo:padding-right="0.356cm" loext:decorative="false"/>
    </style:style>
    <style:style style:name="gr10" style:family="graphic" style:parent-style-name="standard">
      <style:graphic-properties svg:stroke-color="#ffffff" draw:fill-color="#ffffff" draw:textarea-horizontal-align="justify" draw:textarea-vertical-align="middle" draw:auto-grow-height="false" fo:min-height="2.876cm" fo:min-width="18.699cm" style:writing-mode="lr-tb" loext:decorative="false"/>
      <style:paragraph-properties style:writing-mode="lr-tb"/>
    </style:style>
    <style:style style:name="gr11"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48.918cm" fo:padding-top="0.231cm" fo:padding-bottom="0.231cm" fo:padding-left="0.356cm" fo:padding-right="0.356cm" loext:decorative="false"/>
    </style:style>
    <style:style style:name="gr12" style:family="graphic" style:parent-style-name="standard" style:list-style-name="L1">
      <style:graphic-properties svg:stroke-color="#ffffff" draw:fill-color="#ffffff" draw:textarea-horizontal-align="justify" draw:textarea-vertical-align="middle" draw:auto-grow-height="false" fo:min-height="2.925cm" fo:min-width="31.885cm" style:writing-mode="lr-tb" loext:decorative="false"/>
      <style:paragraph-properties style:writing-mode="lr-tb"/>
    </style:style>
    <style:style style:name="gr1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2.083cm" fo:min-width="81.381cm" fo:padding-top="0.231cm" fo:padding-bottom="0.231cm" fo:padding-left="0.356cm" fo:padding-right="0.356cm" loext:decorative="false"/>
    </style:style>
    <style:style style:name="gr14" style:family="graphic" style:parent-style-name="standard" style:list-style-name="L1">
      <style:graphic-properties svg:stroke-color="#ffffff" draw:fill-color="#ffffff" draw:textarea-horizontal-align="justify" draw:textarea-vertical-align="middle" draw:auto-grow-height="false" fo:min-height="2.773cm" fo:min-width="24.265cm"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4.18cm" loext:decorative="false"/>
      <style:paragraph-properties style:writing-mode="lr-tb"/>
    </style:style>
    <style:style style:name="gr16"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7.158cm" fo:min-width="33.578cm" fo:padding-top="0.231cm" fo:padding-bottom="0.231cm" fo:padding-left="0.356cm" fo:padding-right="0.356cm" loext:decorative="false"/>
    </style:style>
    <style:style style:name="gr17" style:family="graphic" style:parent-style-name="standard">
      <style:graphic-properties draw:stroke="none" svg:stroke-color="#000000" draw:fill="none" draw:fill-color="#ffffff" draw:auto-grow-height="true" draw:auto-grow-width="false" fo:max-height="0cm" fo:min-height="6.607cm" loext:decorative="false"/>
      <style:paragraph-properties style:writing-mode="lr-tb"/>
    </style:style>
    <style:style style:name="gr18"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2.238cm" fo:min-width="33.597cm" fo:padding-top="0.231cm" fo:padding-bottom="0.231cm" fo:padding-left="0.356cm" fo:padding-right="0.356cm" loext:decorative="false"/>
    </style:style>
    <style:style style:name="gr19" style:family="graphic" style:parent-style-name="standard">
      <style:graphic-properties svg:stroke-color="#ffffff" draw:fill-color="#ffffff" draw:textarea-horizontal-align="justify" draw:textarea-vertical-align="middle" draw:auto-grow-height="false" fo:min-height="2.876cm" fo:min-width="13.562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725cm" loext:decorative="false"/>
      <style:paragraph-properties style:writing-mode="lr-tb"/>
    </style:style>
    <style:style style:name="gr21" style:family="graphic" style:parent-style-name="standard">
      <style:graphic-properties draw:stroke="none" draw:fill="none" fo:min-height="4.252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56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9.449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1.102cm" loext:decorative="false"/>
      <style:paragraph-properties style:writing-mode="lr-tb"/>
    </style:style>
    <style:style style:name="gr27" style:family="graphic" style:parent-style-name="standard">
      <style:graphic-properties svg:stroke-width="0.212cm" svg:stroke-color="#224b12" draw:marker-start-width="0.518cm" draw:marker-end-width="0.518cm" draw:opacity="0%" draw:textarea-horizontal-align="justify" draw:textarea-vertical-align="middle" draw:auto-grow-height="false" fo:min-height="10.333cm" fo:min-width="32.308cm" fo:padding-top="0.231cm" fo:padding-bottom="0.231cm" fo:padding-left="0.356cm" fo:padding-right="0.356cm" loext:decorative="false"/>
    </style:style>
    <style:style style:name="gr28" style:family="graphic" style:parent-style-name="standard">
      <style:graphic-properties draw:stroke="none" svg:stroke-color="#000000" draw:fill="none" draw:fill-color="#ffffff" draw:auto-grow-height="true" draw:auto-grow-width="false" fo:min-height="1.455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32cm" loext:decorative="false"/>
      <style:paragraph-properties style:writing-mode="lr-tb"/>
    </style:style>
    <style:style style:name="gr30"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15cm" fo:min-width="9.855cm" fo:padding-top="0.252cm" fo:padding-bottom="0.252cm" fo:padding-left="0.377cm" fo:padding-right="0.377cm" draw:shadow-opacity="0%" loext:decorative="false"/>
    </style:style>
    <style:style style:name="gr31" style:family="graphic" style:parent-style-name="objectwithoutfill">
      <style:graphic-properties svg:stroke-width="0.254cm" svg:stroke-color="#861141" draw:marker-start-width="0.584cm" draw:marker-end="Arrowheads_20_1" draw:marker-end-width="0.686cm" draw:fill="none" draw:textarea-vertical-align="middle" fo:padding-top="0.252cm" fo:padding-bottom="0.252cm" fo:padding-left="0.377cm" fo:padding-right="0.377cm" loext:decorative="false"/>
    </style:style>
    <style:style style:name="gr32" style:family="graphic" style:parent-style-name="objectwithoutfill">
      <style:graphic-properties svg:stroke-width="0.254cm" svg:stroke-color="#650953" draw:marker-start-width="0.584cm" draw:marker-end="Arrowheads_20_2" draw:marker-end-width="0.686cm" draw:fill="none" draw:textarea-vertical-align="middle" fo:padding-top="0.252cm" fo:padding-bottom="0.252cm" fo:padding-left="0.377cm" fo:padding-right="0.377cm" loext:decorative="false"/>
    </style:style>
    <style:style style:name="gr33" style:family="graphic" style:parent-style-name="standard">
      <style:graphic-properties draw:stroke="none" svg:stroke-color="#000000" draw:fill="none" draw:fill-color="#ffffff" draw:auto-grow-height="true" draw:auto-grow-width="false" fo:min-height="2.363cm" loext:decorative="false"/>
      <style:paragraph-properties style:writing-mode="lr-tb"/>
    </style:style>
    <style:style style:name="gr3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824cm" fo:min-width="9.791cm" fo:padding-top="0.252cm" fo:padding-bottom="0.252cm" fo:padding-left="0.377cm" fo:padding-right="0.377cm" draw:shadow-opacity="0%" loext:decorative="false"/>
    </style:style>
    <style:style style:name="gr3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9.837cm" fo:padding-top="0.252cm" fo:padding-bottom="0.252cm" fo:padding-left="0.377cm" fo:padding-right="0.377cm" draw:shadow-opacity="0%" loext:decorative="false"/>
    </style:style>
    <style:style style:name="gr36" style:family="graphic" style:parent-style-name="standard">
      <style:graphic-properties draw:stroke="none" svg:stroke-color="#000000" draw:fill="none" draw:fill-color="#ffffff" draw:auto-grow-height="true" draw:auto-grow-width="false" fo:min-height="1.182cm" loext:decorative="false"/>
      <style:paragraph-properties style:writing-mode="lr-tb"/>
    </style:style>
    <style:style style:name="gr37"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51cm" fo:min-width="9.853cm" fo:padding-top="0.252cm" fo:padding-bottom="0.252cm" fo:padding-left="0.377cm" fo:padding-right="0.377cm" draw:shadow-opacity="0%" loext:decorative="false"/>
    </style:style>
    <style:style style:name="gr38"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6.552cm" fo:min-width="14.534cm" fo:padding-top="0.252cm" fo:padding-bottom="0.252cm" fo:padding-left="0.377cm" fo:padding-right="0.377cm" fo:wrap-option="wrap" draw:shadow-opacity="0%" loext:decorative="false"/>
    </style:style>
    <style:style style:name="gr39"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37cm" fo:min-width="15.215cm" fo:padding-top="0.252cm" fo:padding-bottom="0.252cm" fo:padding-left="0.377cm" fo:padding-right="0.377cm" fo:wrap-option="wrap" draw:shadow-opacity="0%" loext:decorative="false"/>
    </style:style>
    <style:style style:name="gr40"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13cm" fo:min-width="9.83cm" fo:padding-top="0.252cm" fo:padding-bottom="0.252cm" fo:padding-left="0.377cm" fo:padding-right="0.377cm" fo:wrap-option="wrap" draw:shadow-opacity="0%" loext:decorative="false"/>
    </style:style>
    <style:style style:name="gr41" style:family="graphic" style:parent-style-name="standard">
      <style:graphic-properties draw:stroke="none" svg:stroke-color="#000000" draw:fill="none" draw:fill-color="#ffffff" draw:auto-grow-height="true" draw:auto-grow-width="false" fo:min-height="2.951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7.3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2.525cm" fo:min-width="0cm" loext:decorative="false"/>
      <style:paragraph-properties style:writing-mode="lr-tb"/>
    </style:style>
    <style:style style:name="gr4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723cm" fo:min-width="5.911cm" fo:padding-top="0.252cm" fo:padding-bottom="0.252cm" fo:padding-left="0.377cm" fo:padding-right="0.377cm" draw:shadow-opacity="0%" loext:decorative="false"/>
    </style:style>
    <style:style style:name="gr4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9cm" fo:min-width="6.432cm" fo:padding-top="0.252cm" fo:padding-bottom="0.252cm" fo:padding-left="0.377cm" fo:padding-right="0.377cm" draw:shadow-opacity="0%" loext:decorative="false"/>
    </style:style>
    <style:style style:name="gr46" style:family="graphic" style:parent-style-name="objectwithoutfill">
      <style:graphic-properties svg:stroke-width="0.254cm" svg:stroke-color="#861141" draw:marker-start-width="0.584cm" draw:marker-end="Arrowheads_20_3" draw:marker-end-width="0.686cm" draw:fill="none" draw:textarea-vertical-align="middle" fo:padding-top="0.252cm" fo:padding-bottom="0.252cm" fo:padding-left="0.377cm" fo:padding-right="0.377cm" loext:decorative="false"/>
    </style:style>
    <style:style style:name="gr47" style:family="graphic" style:parent-style-name="objectwithoutfill">
      <style:graphic-properties svg:stroke-width="0.254cm" svg:stroke-color="#000000" draw:marker-start-width="0.584cm" draw:marker-end="Arrowheads_20_3" draw:marker-end-width="0.686cm" draw:fill="none" draw:textarea-vertical-align="middle" fo:padding-top="0.252cm" fo:padding-bottom="0.252cm" fo:padding-left="0.377cm" fo:padding-right="0.377cm" loext:decorative="false"/>
    </style:style>
    <style:style style:name="gr48"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8.932cm" fo:padding-top="0.252cm" fo:padding-bottom="0.252cm" fo:padding-left="0.377cm" fo:padding-right="0.377cm" draw:shadow-opacity="0%" style:writing-mode="lr-tb" loext:decorative="false"/>
      <style:paragraph-properties style:writing-mode="lr-tb"/>
    </style:style>
    <style:style style:name="gr49" style:family="graphic" style:parent-style-name="objectwithoutfill">
      <style:graphic-properties svg:stroke-width="0.254cm" svg:stroke-color="#000000" draw:marker-start-width="0.584cm" draw:marker-end="" draw:marker-end-width="0.686cm" draw:fill="none" draw:textarea-vertical-align="middle" fo:padding-top="0.252cm" fo:padding-bottom="0.252cm" fo:padding-left="0.377cm" fo:padding-right="0.377cm" loext:decorative="false"/>
    </style:style>
    <style:style style:name="gr50" style:family="graphic" style:parent-style-name="objectwithoutfill">
      <style:graphic-properties svg:stroke-width="0.254cm" svg:stroke-color="#000000" draw:marker-start-width="0.584cm" draw:marker-end="Arrow" draw:marker-end-width="0.686cm" draw:fill="none" draw:textarea-vertical-align="middle" fo:padding-top="0.252cm" fo:padding-bottom="0.252cm" fo:padding-left="0.377cm" fo:padding-right="0.377cm" loext:decorative="false"/>
    </style:style>
    <style:style style:name="gr51" style:family="graphic" style:parent-style-name="standard">
      <style:graphic-properties draw:stroke="none" svg:stroke-color="#000000" draw:fill="none" draw:fill-color="#ffffff" draw:auto-grow-height="true" draw:auto-grow-width="false" fo:min-height="3.544cm" loext:decorative="false"/>
      <style:paragraph-properties style:writing-mode="lr-tb"/>
    </style:style>
    <style:style style:name="gr52"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3.614cm" fo:min-width="12.771cm" fo:padding-top="0.252cm" fo:padding-bottom="0.252cm" fo:padding-left="0.377cm" fo:padding-right="0.377cm" fo:wrap-option="wrap" draw:shadow-opacity="0%" loext:decorative="false"/>
    </style:style>
    <style:style style:name="gr53" style:family="graphic" style:parent-style-name="standard">
      <style:graphic-properties draw:stroke="none" svg:stroke-color="#000000" draw:fill="none" draw:fill-color="#ffffff" draw:textarea-horizontal-align="left" draw:auto-grow-height="true" draw:auto-grow-width="false" fo:min-height="3.561cm" fo:min-width="0cm" loext:decorative="false"/>
      <style:paragraph-properties style:writing-mode="lr-tb"/>
    </style:style>
    <style:style style:name="gr54" style:family="graphic" style:parent-style-name="objectwithoutfill">
      <style:graphic-properties svg:stroke-width="0.254cm" svg:stroke-color="#861141" draw:marker-start-width="0.584cm" draw:marker-end-width="0.584cm" draw:fill="none" draw:textarea-vertical-align="middle" fo:padding-top="0.252cm" fo:padding-bottom="0.252cm" fo:padding-left="0.377cm" fo:padding-right="0.377cm" loext:decorative="false"/>
    </style:style>
    <style:style style:name="gr55" style:family="graphic" style:parent-style-name="objectwithoutfill">
      <style:graphic-properties svg:stroke-width="0.254cm" svg:stroke-color="#861141" draw:marker-start-width="0.584cm" draw:marker-end="Arrowheads_20_4" draw:marker-end-width="0.686cm" draw:fill="none" draw:textarea-vertical-align="middle" fo:padding-top="0.252cm" fo:padding-bottom="0.252cm" fo:padding-left="0.377cm" fo:padding-right="0.377cm" loext:decorative="false"/>
    </style:style>
    <style:style style:name="gr56" style:family="graphic" style:parent-style-name="standard">
      <style:graphic-properties draw:stroke="none" draw:fill="none" fo:min-height="2.363cm" loext:decorative="false"/>
      <style:paragraph-properties style:writing-mode="lr-tb"/>
    </style:style>
    <style:style style:name="gr57"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30.468cm" fo:padding-top="0.231cm" fo:padding-bottom="0.231cm" fo:padding-left="0.356cm" fo:padding-right="0.356cm" loext:decorative="false"/>
    </style:style>
    <style:style style:name="gr58" style:family="graphic" style:parent-style-name="standard" style:list-style-name="L1">
      <style:graphic-properties svg:stroke-color="#ffffff" draw:fill-color="#ffffff" draw:textarea-horizontal-align="justify" draw:textarea-vertical-align="middle" draw:auto-grow-height="false" fo:min-height="2.925cm" fo:min-width="15.945cm" style:writing-mode="lr-tb" loext:decorative="false"/>
      <style:paragraph-properties style:writing-mode="lr-tb"/>
    </style:style>
    <style:style style:name="gr59" style:family="graphic" style:parent-style-name="standard">
      <style:graphic-properties loext:decorative="false"/>
    </style:style>
    <style:style style:name="gr60" style:family="graphic" style:parent-style-name="standard">
      <style:graphic-properties draw:stroke="none" svg:stroke-color="#000000" draw:fill="none" draw:fill-color="#ffffff" draw:auto-grow-height="true" draw:auto-grow-width="false" fo:min-height="4.039cm" loext:decorative="false"/>
      <style:paragraph-properties style:writing-mode="lr-tb"/>
    </style:style>
    <style:style style:name="gr61" style:family="graphic" style:parent-style-name="objectwithoutfill">
      <style:graphic-properties svg:stroke-width="0.254cm" svg:stroke-color="#000000" draw:marker-start-width="0.584cm" draw:marker-end="Arrowheads_20_5" draw:marker-end-width="0.686cm" draw:fill="none" draw:textarea-vertical-align="middle" fo:padding-top="0.252cm" fo:padding-bottom="0.252cm" fo:padding-left="0.377cm" fo:padding-right="0.377cm" loext:decorative="false"/>
    </style:style>
    <style:style style:name="gr62" style:family="graphic" style:parent-style-name="standard">
      <style:graphic-properties draw:stroke="none" svg:stroke-color="#000000" draw:fill="none" draw:fill-color="#ffffff" draw:auto-grow-height="true" draw:auto-grow-width="false" fo:min-height="7.087cm" loext:decorative="false"/>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in-height="5.465cm" loext:decorative="false"/>
      <style:paragraph-properties style:writing-mode="lr-tb"/>
    </style:style>
    <style:style style:name="gr64" style:family="graphic" style:parent-style-name="standard">
      <style:graphic-properties draw:stroke="none" svg:stroke-color="#000000" draw:fill="none" draw:fill-color="#ffffff" draw:auto-grow-height="true" draw:auto-grow-width="false" fo:min-height="8.268cm" loext:decorative="false"/>
      <style:paragraph-properties style:writing-mode="lr-tb"/>
    </style:style>
    <style:style style:name="gr65" style:family="graphic" style:parent-style-name="standard">
      <style:graphic-properties draw:stroke="none" svg:stroke-color="#000000" draw:fill="none" draw:fill-color="#ffffff" draw:auto-grow-height="true" draw:auto-grow-width="false" fo:min-height="10.57cm" loext:decorative="false"/>
      <style:paragraph-properties style:writing-mode="lr-tb"/>
    </style:style>
    <style:style style:name="gr66" style:family="graphic">
      <style:graphic-properties style:protect="size" loext:decorative="false"/>
    </style:style>
    <style:style style:name="gr67"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5.625cm" fo:min-width="121.42cm" style:writing-mode="lr-tb" loext:decorative="false"/>
      <style:paragraph-properties style:writing-mode="lr-tb"/>
    </style:style>
    <style:style style:name="gr68"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69"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28.856cm" fo:min-width="22.242cm" fo:padding-top="0.252cm" fo:padding-bottom="0.252cm" fo:padding-left="0.377cm" fo:padding-right="0.377cm" draw:shadow-opacity="0%" loext:decorative="false"/>
    </style:style>
    <style:style style:name="gr70" style:family="graphic" style:parent-style-name="standard">
      <style:graphic-properties draw:stroke="none" svg:stroke-color="#000000" draw:fill="none" draw:fill-color="#ffffff" draw:auto-grow-height="true" draw:auto-grow-width="false" fo:min-height="4.21cm" loext:decorative="false"/>
      <style:paragraph-properties style:writing-mode="lr-tb"/>
    </style:style>
    <style:style style:name="gr71" style:family="graphic" style:parent-style-name="standard">
      <style:graphic-properties draw:stroke="none" svg:stroke-color="#000000" draw:fill="none" draw:fill-color="#ffffff" draw:auto-grow-height="true" draw:auto-grow-width="false" fo:min-height="2.341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3.625cm" loext:decorative="false"/>
      <style:paragraph-properties style:writing-mode="lr-tb"/>
    </style:style>
    <style:style style:name="gr73"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08cm" fo:min-width="17.798cm" fo:padding-top="0.252cm" fo:padding-bottom="0.252cm" fo:padding-left="0.377cm" fo:padding-right="0.377cm" draw:shadow-opacity="0%" loext:decorative="false"/>
    </style:style>
    <style:style style:name="gr7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033cm" fo:min-width="17.698cm" fo:padding-top="0.252cm" fo:padding-bottom="0.252cm" fo:padding-left="0.377cm" fo:padding-right="0.377cm" draw:shadow-opacity="0%" loext:decorative="false"/>
    </style:style>
    <style:style style:name="gr75" style:family="graphic" style:parent-style-name="standard">
      <style:graphic-properties draw:stroke="none" svg:stroke-color="#000000" draw:fill="none" draw:fill-color="#ffffff" draw:auto-grow-height="true" draw:auto-grow-width="false" fo:min-height="2.646cm" loext:decorative="false"/>
      <style:paragraph-properties style:writing-mode="lr-tb"/>
    </style:style>
    <style:style style:name="gr76"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384cm" fo:min-width="17.768cm" fo:padding-top="0.252cm" fo:padding-bottom="0.252cm" fo:padding-left="0.377cm" fo:padding-right="0.377cm" draw:shadow-opacity="0%" loext:decorative="false"/>
    </style:style>
    <style:style style:name="gr77" style:family="graphic" style:parent-style-name="standard">
      <style:graphic-properties draw:stroke="none" svg:stroke-color="#000000" draw:fill="none" draw:fill-color="#ffffff" draw:auto-grow-height="true" draw:auto-grow-width="false" fo:min-height="2.036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2.645cm" loext:decorative="false"/>
      <style:paragraph-properties style:writing-mode="lr-tb"/>
    </style:style>
    <style:style style:name="gr79"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6cm" fo:min-width="17.792cm" fo:padding-top="0.252cm" fo:padding-bottom="0.252cm" fo:padding-left="0.377cm" fo:padding-right="0.377cm" draw:shadow-opacity="0%" loext:decorative="false"/>
    </style:style>
    <style:style style:name="gr80" style:family="graphic" style:parent-style-name="standard">
      <style:graphic-properties draw:stroke="none" svg:stroke-color="#000000" draw:fill="none" draw:fill-color="#ffffff" draw:auto-grow-height="true" draw:auto-grow-width="false" fo:min-height="2.038cm"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4.044cm" loext:decorative="false"/>
      <style:paragraph-properties style:writing-mode="lr-tb"/>
    </style:style>
    <style:style style:name="gr82"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881cm" fo:min-width="10.874cm" fo:padding-top="0.252cm" fo:padding-bottom="0.252cm" fo:padding-left="0.377cm" fo:padding-right="0.377cm" draw:shadow-opacity="0%" loext:decorative="false"/>
    </style:style>
    <style:style style:name="gr83"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59cm" fo:min-width="11.782cm" fo:padding-top="0.252cm" fo:padding-bottom="0.252cm" fo:padding-left="0.377cm" fo:padding-right="0.377cm" draw:shadow-opacity="0%" loext:decorative="false"/>
    </style:style>
    <style:style style:name="gr84" style:family="graphic" style:parent-style-name="objectwithoutfill">
      <style:graphic-properties svg:stroke-width="0.305cm" svg:stroke-color="#000000" draw:marker-start-width="0.66cm" draw:marker-end="Arrowheads_20_3" draw:marker-end-width="0.762cm" draw:fill="none" draw:textarea-vertical-align="middle" fo:padding-top="0.277cm" fo:padding-bottom="0.277cm" fo:padding-left="0.402cm" fo:padding-right="0.402cm" loext:decorative="false"/>
    </style:style>
    <style:style style:name="gr85" style:family="graphic" style:parent-style-name="standard">
      <style:graphic-properties draw:stroke="none" svg:stroke-color="#000000" draw:fill="none" draw:fill-color="#ffffff" draw:auto-grow-height="true" draw:auto-grow-width="false" fo:min-height="2.037cm" loext:decorative="false"/>
      <style:paragraph-properties style:writing-mode="lr-tb"/>
    </style:style>
    <style:style style:name="gr86"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382cm" fo:min-width="16.19cm" fo:padding-top="0.252cm" fo:padding-bottom="0.252cm" fo:padding-left="0.377cm" fo:padding-right="0.377cm" draw:shadow-opacity="0%" style:writing-mode="lr-tb" loext:decorative="false"/>
      <style:paragraph-properties style:writing-mode="lr-tb"/>
    </style:style>
    <style:style style:name="gr87" style:family="graphic" style:parent-style-name="standard">
      <style:graphic-properties draw:stroke="none" svg:stroke-color="#000000" draw:fill="none" draw:fill-color="#ffffff" draw:auto-grow-height="true" draw:auto-grow-width="false" fo:min-height="6.052cm" loext:decorative="false"/>
      <style:paragraph-properties style:writing-mode="lr-tb"/>
    </style:style>
    <style:style style:name="gr88" style:family="graphic" style:parent-style-name="standard">
      <style:graphic-properties draw:stroke="none" draw:fill="none" fo:min-height="3.939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2.035cm" loext:decorative="false"/>
      <style:paragraph-properties style:writing-mode="lr-tb"/>
    </style:style>
    <style:style style:name="gr90" style:family="graphic" style:parent-style-name="standard" style:list-style-name="L1">
      <style:graphic-properties draw:stroke="none" svg:stroke-color="#000000" draw:fill="none" draw:fill-color="#ffffff" draw:auto-grow-height="true" draw:auto-grow-width="false" fo:min-height="43.682cm" loext:decorative="false"/>
      <style:paragraph-properties style:writing-mode="lr-tb"/>
    </style:style>
    <style:style style:name="gr91"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7.636cm" fo:min-width="56.666cm" fo:padding-top="0.231cm" fo:padding-bottom="0.231cm" fo:padding-left="0.356cm" fo:padding-right="0.356cm" loext:decorative="false"/>
    </style:style>
    <style:style style:name="gr92" style:family="graphic" style:parent-style-name="standard">
      <style:graphic-properties svg:stroke-color="#ffffff" draw:fill-color="#ffffff" draw:textarea-horizontal-align="justify" draw:textarea-vertical-align="middle" draw:auto-grow-height="false" fo:min-height="4.439cm" fo:min-width="19.036cm" style:writing-mode="lr-tb"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8.276cm" loext:decorative="false"/>
      <style:paragraph-properties style:writing-mode="lr-tb"/>
    </style:style>
    <style:style style:name="gr94" style:family="graphic" style:parent-style-name="standard">
      <style:graphic-properties draw:stroke="none" draw:fill="none" fo:min-height="7.603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5.465cm" loext:decorative="false"/>
      <style:paragraph-properties style:writing-mode="lr-tb"/>
    </style:style>
    <style:style style:name="gr96"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4.623cm" fo:min-width="56.673cm" fo:padding-top="0.231cm" fo:padding-bottom="0.231cm" fo:padding-left="0.356cm" fo:padding-right="0.356cm" loext:decorative="false"/>
    </style:style>
    <style:style style:name="gr97" style:family="graphic" style:parent-style-name="standard" style:list-style-name="L1">
      <style:graphic-properties svg:stroke-color="#ffffff" draw:fill-color="#ffffff" draw:textarea-horizontal-align="justify" draw:textarea-vertical-align="middle" draw:auto-grow-height="false" fo:min-height="4.195cm" fo:min-width="39.505cm" style:writing-mode="lr-tb" loext:decorative="false"/>
      <style:paragraph-properties style:writing-mode="lr-tb"/>
    </style:style>
    <style:style style:name="gr98" style:family="graphic" style:parent-style-name="objectwithoutfill">
      <style:graphic-properties svg:stroke-width="0.508cm" svg:stroke-color="#990000" draw:marker-start="Square" draw:marker-start-width="0.965cm" draw:marker-end="Arrow_20_short" draw:marker-end-width="1.067cm" draw:fill="none" draw:textarea-vertical-align="middle" fo:padding-top="0.379cm" fo:padding-bottom="0.379cm" fo:padding-left="0.504cm" fo:padding-right="0.504cm" loext:decorative="false"/>
    </style:style>
    <style:style style:name="gr99"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100"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986cm" fo:min-width="8.677cm" fo:padding-top="0.252cm" fo:padding-bottom="0.252cm" fo:padding-left="0.377cm" fo:padding-right="0.377cm" draw:shadow-opacity="0%" loext:decorative="false"/>
    </style:style>
    <style:style style:name="gr101"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5.625cm" fo:min-width="121.42cm" style:writing-mode="lr-tb" loext:decorative="false"/>
      <style:paragraph-properties style:writing-mode="lr-tb"/>
    </style:style>
    <style:style style:name="gr10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10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7.636cm" fo:min-width="55.066cm" fo:padding-top="0.231cm" fo:padding-bottom="0.231cm" fo:padding-left="0.356cm" fo:padding-right="0.356cm" loext:decorative="false"/>
    </style:style>
    <style:style style:name="gr104" style:family="graphic" style:parent-style-name="standard" style:list-style-name="L1">
      <style:graphic-properties svg:stroke-color="#ffffff" draw:fill-color="#ffffff" draw:textarea-horizontal-align="justify" draw:textarea-vertical-align="middle" draw:auto-grow-height="false" fo:min-height="4.195cm" fo:min-width="39.505cm" style:writing-mode="lr-tb" loext:decorative="false"/>
      <style:paragraph-properties style:writing-mode="lr-tb"/>
    </style:style>
    <style:style style:name="pr1" style:family="presentation" style:parent-style-name="Default-notes">
      <style:graphic-properties draw:fill-color="#ffffff" draw:auto-grow-height="true" fo:min-height="12.572cm" loext:decorative="false"/>
      <style:paragraph-properties style:writing-mode="lr-tb"/>
    </style:style>
    <style:style style:name="pr2" style:family="presentation" style:parent-style-name="Default-notes">
      <style:graphic-properties draw:fill-color="#ffffff" draw:auto-grow-height="false" fo:min-height="12.572cm" loext:decorative="false"/>
      <style:paragraph-properties style:writing-mode="lr-tb"/>
    </style:style>
    <style:style style:name="co1" style:family="table-column">
      <style:table-column-properties style:column-width="4.214cm" style:use-optimal-column-width="false"/>
    </style:style>
    <style:style style:name="co2" style:family="table-column">
      <style:table-column-properties style:column-width="4.174cm" style:use-optimal-column-width="false"/>
    </style:style>
    <style:style style:name="co3" style:family="table-column">
      <style:table-column-properties style:column-width="2.881cm" style:use-optimal-column-width="false"/>
    </style:style>
    <style:style style:name="co4" style:family="table-column">
      <style:table-column-properties style:column-width="4.234cm" style:use-optimal-column-width="false"/>
    </style:style>
    <style:style style:name="co5" style:family="table-column">
      <style:table-column-properties style:column-width="2.691cm" style:use-optimal-column-width="false"/>
    </style:style>
    <style:style style:name="co6" style:family="table-column">
      <style:table-column-properties style:column-width="4.6cm" style:use-optimal-column-width="false"/>
    </style:style>
    <style:style style:name="co7" style:family="table-column">
      <style:table-column-properties style:column-width="2.704cm" style:use-optimal-column-width="false"/>
    </style:style>
    <style:style style:name="co8" style:family="table-column">
      <style:table-column-properties style:column-width="4.704cm" style:use-optimal-column-width="false"/>
    </style:style>
    <style:style style:name="ro1" style:family="table-row">
      <style:table-row-properties style:row-height="1.791cm" style:use-optimal-row-height="false"/>
    </style:style>
    <style:style style:name="ro2" style:family="table-row">
      <style:table-row-properties style:row-height="1.795cm" style:use-optimal-row-height="false"/>
    </style:style>
    <style:style style:name="ce1" style:family="table-cell">
      <style:paragraph-properties fo:text-align="center" fo:border="0.03pt solid #ffffff"/>
      <style:text-properties fo:color="#000000" loext:opacity="100%" fo:font-size="30pt" style:font-size-asian="30pt" style:font-size-complex="30pt"/>
    </style:style>
    <style:style style:name="ce2" style:family="table-cell">
      <style:paragraph-properties fo:border="0.03pt solid #ffffff"/>
      <style:text-properties fo:color="#000000" loext:opacity="100%" fo:font-size="22pt"/>
    </style:style>
    <style:style style:name="ce3" style:family="table-cell">
      <style:paragraph-properties fo:border="0.03pt solid #ffffff"/>
      <style:text-properties fo:color="#000000" loext:opacity="100%" fo:font-size="30pt" style:font-size-asian="30pt" style:font-size-complex="30pt"/>
    </style:style>
    <style:style style:name="ce4" style:family="table-cell">
      <style:paragraph-properties fo:border="0.03pt solid #ffffff"/>
      <style:text-properties fo:color="#000000" loext:opacity="100%" fo:font-size="22pt" style:font-size-asian="22pt" style:font-size-complex="22pt"/>
    </style:style>
    <style:style style:name="P1" style:family="paragraph">
      <loext:graphic-properties draw:opacity="0%"/>
      <style:paragraph-properties fo:text-align="center"/>
    </style:style>
    <style:style style:name="P2" style:family="paragraph">
      <loext:graphic-properties draw:fill="none"/>
      <style:paragraph-properties fo:margin-left="0cm" fo:margin-right="0cm" fo:margin-top="0cm" fo:margin-bottom="0cm" fo:line-height="100%" fo:text-align="center" fo:text-indent="0cm"/>
    </style:style>
    <style:style style:name="P3" style:family="paragraph">
      <style:paragraph-properties fo:text-align="center" style:writing-mode="lr-tb"/>
      <style:text-properties fo:color="#6b000d" loext:opacity="100%" fo:font-size="40pt" fo:font-weight="bold"/>
    </style:style>
    <style:style style:name="P4" style:family="paragraph">
      <loext:graphic-properties draw:fill-color="#ffffff"/>
      <style:paragraph-properties fo:text-align="center" style:writing-mode="lr-tb"/>
      <style:text-properties fo:color="#6b000d" loext:opacity="100%" fo:font-size="40pt" fo:font-weight="bold"/>
    </style:style>
    <style:style style:name="P5" style:family="paragraph">
      <style:paragraph-properties fo:margin-left="0cm" fo:margin-right="0cm" fo:margin-top="0cm" fo:margin-bottom="0cm" fo:line-height="100%" fo:text-align="center" fo:text-indent="0cm" style:writing-mode="lr-tb"/>
      <style:text-properties fo:font-size="18pt"/>
    </style:style>
    <style:style style:name="P6" style:family="paragraph">
      <loext:graphic-properties draw:fill="gradient" draw:fill-color="#990000" draw:fill-gradient-name="Gradient_20_23" draw:opacity="100%"/>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none"/>
      <style:paragraph-properties fo:text-align="center"/>
    </style:style>
    <style:style style:name="P8" style:family="paragraph">
      <loext:graphic-properties draw:fill="none" draw:fill-color="#6b000d"/>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text-properties fo:color="#ffffff" loext:opacity="100%" fo:font-size="24pt" style:font-size-asian="28pt" style:font-size-complex="28pt"/>
    </style:style>
    <style:style style:name="P11" style:family="paragraph">
      <style:paragraph-properties fo:margin-left="0cm" fo:margin-right="0cm" fo:margin-top="0cm" fo:margin-bottom="0cm" fo:line-height="100%" fo:text-align="center" fo:text-indent="0cm" style:writing-mode="lr-tb"/>
      <style:text-properties fo:color="#6b000d" loext:opacity="100%" fo:font-size="40pt" fo:font-weight="bold"/>
    </style:style>
    <style:style style:name="P12"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40pt" fo:font-weight="bold"/>
    </style:style>
    <style:style style:name="P13" style:family="paragraph">
      <loext:graphic-properties draw:fill="none" draw:fill-color="#ffffff"/>
      <style:text-properties style:font-name="Liberation Sans" fo:font-size="30pt" fo:font-weight="bold" style:font-size-asian="30pt" style:font-weight-asian="bold" style:font-size-complex="30pt" style:font-weight-complex="bold"/>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text-properties style:font-name="Liberation Sans" fo:font-size="18pt"/>
    </style:style>
    <style:style style:name="P16" style:family="paragraph">
      <loext:graphic-properties draw:fill="none" draw:fill-color="#ffffff"/>
      <style:paragraph-properties fo:text-align="start"/>
      <style:text-properties fo:font-size="30pt" style:font-size-asian="30pt" style:font-size-complex="30pt"/>
    </style:style>
    <style:style style:name="P17" style:family="paragraph">
      <loext:graphic-properties draw:fill="none"/>
    </style:style>
    <style:style style:name="P18" style:family="paragraph">
      <style:paragraph-properties fo:text-align="end"/>
    </style:style>
    <style:style style:name="P19" style:family="paragraph">
      <loext:graphic-properties draw:fill="none" draw:fill-color="#ffffff"/>
      <style:paragraph-properties fo:text-align="end"/>
      <style:text-properties fo:font-size="30pt" style:font-size-asian="30pt" style:font-size-complex="30pt"/>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indent="0cm"/>
    </style:style>
    <style:style style:name="P22" style:family="paragraph">
      <loext:graphic-properties draw:fill="none" draw:fill-color="#ffffff"/>
      <style:text-properties fo:font-size="28pt" style:font-size-asian="28pt" style:font-size-complex="28pt"/>
    </style:style>
    <style:style style:name="P23" style:family="paragraph">
      <style:paragraph-properties fo:text-align="center"/>
    </style:style>
    <style:style style:name="P24" style:family="paragraph">
      <loext:graphic-properties draw:fill="none" draw:fill-color="#ffffff"/>
      <style:paragraph-properties fo:text-align="center"/>
      <style:text-properties fo:font-size="30pt" style:font-size-asian="30pt" style:font-size-complex="30pt"/>
    </style:style>
    <style:style style:name="P25" style:family="paragraph">
      <loext:graphic-properties draw:fill="none" draw:fill-color="#ffffff"/>
      <style:paragraph-properties fo:text-align="center"/>
    </style:style>
    <style:style style:name="P26" style:family="paragraph">
      <loext:graphic-properties draw:fill="none" draw:fill-color="#ffffff"/>
    </style:style>
    <style:style style:name="P27" style:family="paragraph">
      <loext:graphic-properties draw:fill="none" draw:fill-color="#ffffff"/>
      <style:paragraph-properties fo:text-align="start"/>
      <style:text-properties style:text-underline-style="none"/>
    </style:style>
    <style:style style:name="P28" style:family="paragraph">
      <loext:graphic-properties draw:fill="none" draw:fill-color="#ffffff"/>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loext:graphic-properties draw:opacity="0%"/>
      <style:paragraph-properties fo:text-align="center" style:writing-mode="lr-tb"/>
    </style:style>
    <style:style style:name="P30" style:family="paragraph">
      <loext:graphic-properties draw:fill="none"/>
      <style:paragraph-properties fo:text-align="star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agraph-properties fo:text-align="center"/>
      <style:text-properties fo:color="#000000" loext:opacity="100%" fo:font-size="30pt" style:font-size-asian="30pt" style:font-size-complex="30pt"/>
    </style:style>
    <style:style style:name="P32" style:family="paragraph">
      <style:paragraph-properties fo:text-align="center"/>
      <style:text-properties fo:color="#000000" loext:opacity="100%" fo:font-size="22pt" style:font-size-asian="22pt" style:font-size-complex="22pt"/>
    </style:style>
    <style:style style:name="P33" style:family="paragraph">
      <style:paragraph-properties fo:text-align="center"/>
      <style:text-properties fo:color="#000000" loext:opacity="100%" fo:font-size="22pt"/>
    </style:style>
    <style:style style:name="P34" style:family="paragraph">
      <loext:graphic-properties draw:fill="none" draw:fill-color="#ffffff"/>
      <style:paragraph-properties fo:margin-left="0cm" fo:margin-right="0cm" fo:margin-top="0cm" fo:margin-bottom="0cm" fo:line-height="100%" fo:text-indent="0cm"/>
      <style:text-properties style:text-underline-style="none" fo:font-weight="bold" style:font-weight-asian="bold" style:font-weight-complex="bold"/>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color="#ffffff"/>
    </style:style>
    <style:style style:name="P37" style:family="paragraph">
      <loext:graphic-properties draw:fill="none" draw:fill-color="#ffffff"/>
      <style:paragraph-properties fo:text-align="center"/>
      <style:text-properties fo:font-size="46pt" style:font-size-asian="46pt" style:font-size-complex="46pt"/>
    </style:style>
    <style:style style:name="P38" style:family="paragraph">
      <loext:graphic-properties draw:fill="none" draw:fill-color="#ffffff"/>
      <style:text-properties fo:font-size="46pt" style:font-size-asian="46pt" style:font-size-complex="46pt"/>
    </style:style>
    <style:style style:name="P39" style:family="paragraph">
      <loext:graphic-properties draw:fill="none" draw:fill-color="#ffffff"/>
      <style:paragraph-properties fo:text-align="start"/>
      <style:text-properties fo:font-size="46pt" style:text-underline-style="none" style:font-size-asian="46pt" style:font-size-complex="46pt"/>
    </style:style>
    <style:style style:name="P40" style:family="paragraph">
      <loext:graphic-properties draw:fill="none" draw:fill-color="#ffffff"/>
      <style:paragraph-properties fo:text-align="center"/>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P41" style:family="paragraph">
      <style:paragraph-properties fo:text-align="center"/>
      <style:text-properties fo:font-size="46pt" style:font-size-asian="46pt" style:font-size-complex="46pt"/>
    </style:style>
    <style:style style:name="P42" style:family="paragraph">
      <loext:graphic-properties draw:opacity="0%"/>
      <style:paragraph-properties fo:text-align="center" style:writing-mode="lr-tb"/>
      <style:text-properties fo:font-size="46pt" style:font-size-asian="46pt" style:font-size-complex="46pt"/>
    </style:style>
    <style:style style:name="P43" style:family="paragraph">
      <loext:graphic-properties draw:fill="none"/>
      <style:paragraph-properties fo:text-align="start"/>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P44" style:family="paragraph">
      <loext:graphic-properties draw:fill="none" draw:fill-color="#ffffff"/>
      <style:paragraph-properties fo:margin-left="0cm" fo:margin-right="0cm" fo:margin-top="0cm" fo:margin-bottom="0cm" fo:line-height="100%" fo:text-align="start" fo:text-indent="0cm"/>
    </style:style>
    <style:style style:name="P45" style:family="paragraph">
      <style:paragraph-properties fo:text-align="center" style:writing-mode="lr-tb"/>
      <style:text-properties fo:color="#6b000d" loext:opacity="100%" fo:font-size="56pt" fo:font-weight="bold" style:font-size-asian="56pt" style:font-size-complex="56pt"/>
    </style:style>
    <style:style style:name="P46" style:family="paragraph">
      <loext:graphic-properties draw:fill-color="#ffffff"/>
      <style:paragraph-properties fo:text-align="center" style:writing-mode="lr-tb"/>
      <style:text-properties fo:color="#6b000d" loext:opacity="100%" fo:font-size="56pt" fo:font-weight="bold" style:font-size-asian="56pt" style:font-size-complex="56pt"/>
    </style:style>
    <style:style style:name="P47" style:family="paragraph">
      <loext:graphic-properties draw:fill="none" draw:fill-color="#ffffff"/>
      <style:paragraph-properties fo:text-align="start"/>
      <style:text-properties fo:font-size="42pt" style:font-size-asian="42pt" style:font-size-complex="42pt"/>
    </style:style>
    <style:style style:name="P48" style:family="paragraph">
      <loext:graphic-properties draw:fill="none"/>
      <style:paragraph-properties fo:text-align="center"/>
      <style:text-properties fo:font-size="72pt" style:font-size-asian="72pt" style:font-size-complex="72pt"/>
    </style:style>
    <style:style style:name="P49" style:family="paragraph">
      <loext:graphic-properties draw:fill="none" draw:fill-color="#ffffff"/>
      <style:paragraph-properties fo:text-align="end"/>
      <style:text-properties fo:font-size="42pt" style:font-size-asian="42pt" style:font-size-complex="42pt"/>
    </style:style>
    <style:style style:name="P50" style:family="paragraph">
      <style:paragraph-properties fo:margin-left="0cm" fo:margin-right="0cm" fo:margin-top="0cm" fo:margin-bottom="0cm" fo:line-height="100%" fo:text-align="center" fo:text-indent="0cm" style:writing-mode="lr-tb"/>
      <style:text-properties fo:color="#6b000d" loext:opacity="100%" fo:font-size="56pt" fo:font-weight="bold" style:font-size-asian="56pt" style:font-size-complex="56pt"/>
    </style:style>
    <style:style style:name="P51"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56pt" fo:font-weight="bold" style:font-size-asian="56pt" style:font-size-complex="56pt"/>
    </style:style>
    <style:style style:name="P52" style:family="paragraph">
      <loext:graphic-properties draw:fill="none" draw:fill-color="#ffffff"/>
      <style:text-properties fo:font-size="60pt" fo:font-weight="bold" style:font-size-asian="60pt" style:font-weight-asian="bold" style:font-size-complex="60pt" style:font-weight-complex="bold"/>
    </style:style>
    <style:style style:name="T1" style:family="text">
      <style:text-properties fo:color="#6b000d" loext:opacity="100%" fo:font-size="40pt" fo:font-weight="bold"/>
    </style:style>
    <style:style style:name="T2" style:family="text">
      <style:text-properties fo:color="#ffffff" loext:opacity="100%" fo:font-size="88pt" fo:font-weight="bold" style:font-size-asian="88pt" style:font-size-complex="88pt"/>
    </style:style>
    <style:style style:name="T3" style:family="text">
      <style:text-properties fo:color="#ffffff" loext:opacity="100%" fo:font-size="28pt" fo:font-weight="bold" style:font-size-asian="28pt" style:font-weight-asian="bold" style:font-size-complex="28pt" style:font-weight-complex="bold"/>
    </style:style>
    <style:style style:name="T4" style:family="text">
      <style:text-properties fo:color="#ffffff" loext:opacity="100%" fo:font-size="42pt" fo:font-weight="bold" style:font-size-asian="42pt" style:font-weight-asian="bold" style:font-size-complex="42pt" style:font-weight-complex="bold"/>
    </style:style>
    <style:style style:name="T5" style:family="text">
      <style:text-properties fo:color="#ffffff" loext:opacity="100%" style:text-position="33% 58%" fo:font-size="42pt" fo:font-weight="bold" style:font-size-asian="42pt" style:font-weight-asian="bold" style:font-size-complex="42pt" style:font-weight-complex="bold"/>
    </style:style>
    <style:style style:name="T6" style:family="text">
      <style:text-properties fo:color="#ffffff" loext:opacity="100%" style:text-position="33% 58%" fo:font-size="11pt" fo:font-weight="bold" style:font-size-asian="11pt" style:font-weight-asian="bold" style:font-size-complex="11pt" style:font-weight-complex="bold"/>
    </style:style>
    <style:style style:name="T7" style:family="text">
      <style:text-properties fo:color="#ffffff" loext:opacity="100%" style:text-position="33% 58%" fo:font-size="26pt" fo:font-weight="bold" style:font-size-asian="26pt" style:font-weight-asian="bold" style:font-size-complex="26pt" style:font-weight-complex="bold"/>
    </style:style>
    <style:style style:name="T8" style:family="text">
      <style:text-properties fo:color="#ffffff" loext:opacity="100%" style:text-position="0% 100%" fo:font-size="26pt" fo:font-weight="bold" style:font-size-asian="26pt" style:font-weight-asian="bold" style:font-size-complex="26pt" style:font-weight-complex="bold"/>
    </style:style>
    <style:style style:name="T9" style:family="text">
      <style:text-properties fo:color="#ffffff" loext:opacity="100%" fo:font-size="24pt" style:font-size-asian="28pt" style:font-size-complex="28pt"/>
    </style:style>
    <style:style style:name="T10" style:family="text">
      <style:text-properties fo:color="#6b000d" loext:opacity="100%" fo:font-size="40pt" fo:font-weight="bold" style:font-size-asian="40pt" style:font-weight-asian="bold" style:font-size-complex="40pt" style:font-weight-complex="bold"/>
    </style:style>
    <style:style style:name="T11" style:family="text">
      <style:text-properties style:font-name="Liberation Sans" fo:font-size="30pt" fo:font-weight="normal" style:font-size-asian="30pt" style:font-weight-asian="normal" style:font-size-complex="30pt" style:font-weight-complex="normal"/>
    </style:style>
    <style:style style:name="T12" style:family="text">
      <style:text-properties style:font-name="Liberation Sans" fo:font-size="28pt" style:font-size-asian="28pt" style:font-size-complex="28pt"/>
    </style:style>
    <style:style style:name="T13" style:family="text">
      <style:text-properties fo:font-size="30pt" style:font-size-asian="30pt" style:font-size-complex="30pt"/>
    </style:style>
    <style:style style:name="T14" style:family="text">
      <style:text-properties fo:font-size="54pt" fo:font-weight="bold" style:font-size-asian="54pt" style:font-weight-asian="bold" style:font-size-complex="54pt" style:font-weight-complex="bold"/>
    </style:style>
    <style:style style:name="T15" style:family="text">
      <style:text-properties fo:color="#c9211e" loext:opacity="100%"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style:font-size-asian="28pt" style:font-size-complex="28pt"/>
    </style:style>
    <style:style style:name="T18" style:family="text">
      <style:text-properties style:text-underline-style="none"/>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color="#000000" loext:opacity="100%" fo:font-size="30pt" style:font-size-asian="30pt" style:font-size-complex="30pt"/>
    </style:style>
    <style:style style:name="T21" style:family="text">
      <style:text-properties fo:color="#000000" loext:opacity="100%" fo:font-size="22pt" style:font-size-asian="22pt" style:font-size-complex="22pt"/>
    </style:style>
    <style:style style:name="T22" style:family="text">
      <style:text-properties fo:color="#000000" loext:opacity="100%" fo:font-size="22pt"/>
    </style:style>
    <style:style style:name="T23" style:family="text">
      <style:text-properties fo:font-weight="bold" style:font-weight-asian="bold" style:font-weight-complex="bold"/>
    </style:style>
    <style:style style:name="T24" style:family="text">
      <style:text-properties style:text-position="sub 58%"/>
    </style:style>
    <style:style style:name="T25" style:family="text">
      <style:text-properties style:text-position="0% 100%"/>
    </style:style>
    <style:style style:name="T26" style:family="text">
      <style:text-properties style:text-position="super 58%"/>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1" fo:font-size="30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 style:font-size-complex="18pt" style:font-style-complex="italic"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style:text-underline-style="none"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size="30pt" fo:font-weight="bold" style:font-size-asian="30pt" style:font-weight-asian="bold" style:font-size-complex="30pt" style:font-weight-complex="bold"/>
    </style:style>
    <style:style style:name="T34" style:family="text">
      <style:text-properties fo:font-size="28pt" fo:font-weight="normal" style:font-size-asian="28pt" style:font-weight-asian="normal" style:font-size-complex="28pt" style:font-weight-complex="normal"/>
    </style:style>
    <style:style style:name="T35" style:family="text">
      <style:text-properties fo:color="#ffffff" loext:opacity="100%" fo:font-size="104pt" fo:font-weight="bold" style:font-size-asian="104pt" style:font-size-complex="104pt"/>
    </style:style>
    <style:style style:name="T36" style:family="text">
      <style:text-properties fo:color="#ffffff" loext:opacity="100%" fo:font-size="52pt" fo:font-weight="bold" style:font-size-asian="52pt" style:font-weight-asian="bold" style:font-size-complex="52pt" style:font-weight-complex="bold"/>
    </style:style>
    <style:style style:name="T37" style:family="text">
      <style:text-properties fo:color="#ffffff" loext:opacity="100%" style:text-position="33% 58%" fo:font-size="52pt" fo:font-weight="bold" style:font-size-asian="52pt" style:font-weight-asian="bold" style:font-size-complex="52pt" style:font-weight-complex="bold"/>
    </style:style>
    <style:style style:name="T38" style:family="text">
      <style:text-properties fo:color="#ffffff" loext:opacity="100%" style:text-position="0% 100%" fo:font-size="42pt" fo:font-weight="bold" style:font-size-asian="42pt" style:font-weight-asian="bold" style:font-size-complex="42pt" style:font-weight-complex="bold"/>
    </style:style>
    <style:style style:name="T39" style:family="text">
      <style:text-properties fo:font-size="46pt" style:font-size-asian="46pt" style:font-size-complex="46pt"/>
    </style:style>
    <style:style style:name="T40" style:family="text">
      <style:text-properties fo:font-size="46pt" style:text-underline-style="none" style:font-size-asian="46pt" style:font-size-complex="46pt"/>
    </style:style>
    <style:style style:name="T41" style:family="text">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T42" style:family="text">
      <style:text-properties fo:font-variant="normal" fo:text-transform="none" style:use-window-font-color="true" loext:opacity="0%" style:text-outline="false" style:text-line-through-style="none" style:text-line-through-type="none" style:font-name="Liberation Sans1" fo:font-size="54pt" fo:font-style="italic" fo:text-shadow="none" style:text-underline-style="solid" style:text-underline-width="auto" style:text-underline-color="font-color" fo:font-weight="bold" style:letter-kerning="true" style:font-name-asian="Noto Sans CJK SC" style:font-size-asian="54pt" style:font-style-asian="italic" style:font-weight-asian="bold" style:font-name-complex="Lohit Devanagari" style:font-size-complex="54pt" style:font-style-complex="italic"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bold" style:letter-kerning="true" style:font-name-asian="Noto Sans CJK SC" style:font-size-asian="54pt" style:font-style-asian="normal" style:font-weight-asian="bold" style:font-name-complex="Lohit Devanagari" style:font-size-complex="54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1" fo:font-size="54pt" fo:font-style="italic" fo:text-shadow="none" style:text-underline-style="none" fo:font-weight="bold" style:letter-kerning="true" style:font-name-asian="Noto Sans CJK SC" style:font-size-asian="54pt" style:font-style-asian="italic" style:font-weight-asian="bold" style:font-name-complex="Lohit Devanagari" style:font-size-complex="54pt" style:font-style-complex="italic" style:font-weight-complex="bold"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normal" style:letter-kerning="true" style:font-name-asian="Noto Sans CJK SC" style:font-size-asian="54pt" style:font-style-asian="italic" style:font-weight-asian="normal" style:font-name-complex="Lohit Devanagari" style:font-size-complex="5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normal" style:letter-kerning="true" style:font-name-asian="Noto Sans CJK SC" style:font-size-asian="54pt" style:font-style-asian="normal" style:font-weight-asian="normal" style:font-name-complex="Lohit Devanagari" style:font-size-complex="54pt" style:font-style-complex="normal" style:font-weight-complex="normal" style:text-emphasize="none" style:font-relief="none" style:text-overline-style="none" style:text-overline-color="font-color"/>
    </style:style>
    <style:style style:name="T47" style:family="text">
      <style:text-properties fo:color="#6b000d" loext:opacity="100%" fo:font-size="56pt" fo:font-weight="bold" style:font-size-asian="56pt" style:font-size-complex="56pt"/>
    </style:style>
    <style:style style:name="T48" style:family="text">
      <style:text-properties fo:font-size="42pt" style:font-size-asian="42pt" style:font-size-complex="42pt"/>
    </style:style>
    <style:style style:name="T49" style:family="text">
      <style:text-properties fo:font-size="72pt" fo:font-weight="bold" style:font-size-asian="72pt" style:font-weight-asian="bold" style:font-size-complex="72pt" style:font-weight-complex="bold"/>
    </style:style>
    <style:style style:name="T50" style:family="text">
      <style:text-properties fo:color="#6b000d" loext:opacity="100%" fo:font-size="56pt" fo:font-weight="bold" style:font-size-asian="56pt" style:font-weight-asian="bold" style:font-size-complex="56pt" style:font-weight-complex="bold"/>
    </style:style>
    <style:style style:name="T51" style:family="text">
      <style:text-properties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20.955cm" svg:x="55.98cm" svg:y="19.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2" draw:layer="layout" svg:width="121.92cm" svg:height="4.453cm" svg:x="0cm" svg:y="86.996cm">
          <draw:image xlink:href="Pictures/1000000000000780000004DA543A29EA.jpg" xlink:type="simple" xlink:show="embed" xlink:actuate="onLoad" draw:mime-type="image/jpeg">
            <text:p/>
          </draw:image>
        </draw:frame>
        <draw:custom-shape draw:style-name="gr3" draw:text-style-name="P1" draw:layer="layout" svg:width="34.29cm" svg:height="20.955cm" svg:x="1.905cm" svg:y="41.275cm">
          <text:p/>
          <draw:enhanced-geometry svg:viewBox="0 0 21600 21600" draw:mirror-horizontal="false" draw:mirror-vertical="false" draw:type="rectangle" draw:enhanced-path="M 0 0 L 21600 0 21600 21600 0 21600 0 0 Z N"/>
        </draw:custom-shape>
        <draw:custom-shape draw:style-name="gr4" draw:text-style-name="P4" draw:layer="layout" svg:width="26.67cm" svg:height="2.225cm" svg:x="5.715cm" svg:y="40.32cm">
          <text:p text:style-name="P3"><text:span text:style-name="T1">NUC</text:span><text:span text:style-name="T1">LEA</text:span><text:span text:style-name="T1">R </text:span><text:span text:style-name="T1">STAT</text:span><text:span text:style-name="T1">ISTIC</text:span><text:span text:style-name="T1">AL </text:span><text:span text:style-name="T1">EQUI</text:span><text:span text:style-name="T1">LIBRI</text:span><text:span text:style-name="T1">UM</text:span></text:p>
          <draw:enhanced-geometry svg:viewBox="0 0 21600 21600" draw:type="rectangle" draw:enhanced-path="M 0 0 L 21600 0 21600 21600 0 21600 0 0 Z N"/>
        </draw:custom-shape>
        <draw:custom-shape draw:style-name="gr5" draw:text-style-name="P6" draw:layer="layout" svg:width="121.92cm" svg:height="12.7cm" svg:x="0cm" svg:y="0cm">
          <text:p text:style-name="P5"><text:span text:style-name="T2">A</text:span><text:span text:style-name="T2">da</text:span><text:span text:style-name="T2">pt</text:span><text:span text:style-name="T2">iv</text:span><text:span text:style-name="T2">e </text:span><text:span text:style-name="T2">N</text:span><text:span text:style-name="T2">uc</text:span><text:span text:style-name="T2">le</text:span><text:span text:style-name="T2">ar </text:span><text:span text:style-name="T2">St</text:span><text:span text:style-name="T2">ati</text:span><text:span text:style-name="T2">sti</text:span><text:span text:style-name="T2">ca</text:span><text:span text:style-name="T2">l </text:span><text:span text:style-name="T2">E</text:span><text:span text:style-name="T2">q</text:span><text:span text:style-name="T2">uil</text:span><text:span text:style-name="T2">ib</text:span><text:span text:style-name="T2">ri</text:span><text:span text:style-name="T2">u</text:span><text:span text:style-name="T2">m </text:span><text:span text:style-name="T2">fo</text:span><text:span text:style-name="T2">r </text:span><text:span text:style-name="T2">Ty</text:span><text:span text:style-name="T2">pe </text:span><text:span text:style-name="T2">Ia </text:span><text:span text:style-name="T2">S</text:span><text:span text:style-name="T2">N </text:span><text:span text:style-name="T2">Si</text:span><text:span text:style-name="T2">m</text:span><text:span text:style-name="T2">ul</text:span><text:span text:style-name="T2">ati</text:span><text:span text:style-name="T2">o</text:span><text:span text:style-name="T2">n</text:span></text:p>
          <text:p text:style-name="P5"><text:span text:style-name="T3"/></text:p>
          <text:p text:style-name="P5"><text:span text:style-name="T4">Zhi </text:span><text:span text:style-name="T4">Chen</text:span><text:span text:style-name="T5">1</text:span><text:span text:style-name="T4">, </text:span><text:span text:style-name="T4">Ryan </text:span><text:span text:style-name="T4">Brad</text:span><text:span text:style-name="T4">y</text:span><text:span text:style-name="T5">1</text:span><text:span text:style-name="T4">, </text:span><text:span text:style-name="T4">Khan</text:span><text:span text:style-name="T4">ak </text:span><text:span text:style-name="T4">Bhar</text:span><text:span text:style-name="T4">gava</text:span><text:span text:style-name="T5">1</text:span><text:span text:style-name="T4">, </text:span><text:span text:style-name="T4">Eric </text:span><text:span text:style-name="T4">T. </text:span><text:span text:style-name="T4">John</text:span><text:span text:style-name="T4">son</text:span><text:span text:style-name="T5">1</text:span><text:span text:style-name="T4">, </text:span><text:span text:style-name="T4">Alex</text:span><text:span text:style-name="T4">ande</text:span><text:span text:style-name="T4">r </text:span><text:span text:style-name="T4">Smit</text:span><text:span text:style-name="T4">h </text:span><text:span text:style-name="T4">Clark</text:span><text:span text:style-name="T5">1</text:span><text:span text:style-name="T4">, </text:span><text:span text:style-name="T4">and </text:span><text:span text:style-name="T4">Mike </text:span><text:span text:style-name="T4">Zing</text:span><text:span text:style-name="T4">ale</text:span><text:span text:style-name="T5">1</text:span></text:p>
          <text:p text:style-name="P5"><text:span text:style-name="T6"/></text:p>
          <text:p text:style-name="P5"><text:span text:style-name="T7">1</text:span><text:span text:style-name="T8">Depart</text:span><text:span text:style-name="T8">ment of </text:span><text:span text:style-name="T8">Physics </text:span><text:span text:style-name="T8">and </text:span><text:span text:style-name="T8">Astrono</text:span><text:span text:style-name="T8">my, </text:span><text:span text:style-name="T8">Stony </text:span><text:span text:style-name="T8">Brook </text:span><text:span text:style-name="T8">Universi</text:span><text:span text:style-name="T8">ty, </text:span><text:span text:style-name="T8">Stony </text:span><text:span text:style-name="T8">Brook, </text:span><text:span text:style-name="T8">NY </text:span><text:span text:style-name="T8">11794-</text:span><text:span text:style-name="T8">3800, </text:span><text:span text:style-name="T8">USA</text:span></text:p>
          <draw:enhanced-geometry svg:viewBox="0 0 21600 21600" draw:type="rectangle" draw:enhanced-path="M 0 0 L 21600 0 21600 21600 0 21600 0 0 Z N"/>
        </draw:custom-shape>
        <draw:frame draw:style-name="gr6" draw:text-style-name="P7" draw:layer="layout" svg:width="0.001cm" svg:height="0.001cm" svg:x="53.874cm" svg:y="20.295cm">
          <draw:image xlink:href="Pictures/100065AD00000000000000000403F9E1.pdf" xlink:type="simple" xlink:show="embed" xlink:actuate="onLoad" draw:mime-type="application/pdf">
            <text:p/>
          </draw:image>
        </draw:frame>
        <draw:frame draw:style-name="gr6" draw:text-style-name="P7" draw:layer="layout" svg:width="0.001cm" svg:height="0.001cm" svg:x="55.241cm" svg:y="87.938cm">
          <draw:image xlink:href="Pictures/1000B69100000000000000006DA8F921.pdf" xlink:type="simple" xlink:show="embed" xlink:actuate="onLoad" draw:mime-type="application/pdf">
            <text:p/>
          </draw:image>
        </draw:frame>
        <draw:custom-shape draw:style-name="gr7" draw:text-style-name="P8" draw:layer="layout" svg:width="121.92cm" svg:height="4.445cm" svg:x="0cm" svg:y="86.995cm">
          <text:p/>
          <draw:enhanced-geometry svg:viewBox="0 0 21600 21600" draw:type="rectangle" draw:enhanced-path="M 0 0 L 21600 0 21600 21600 0 21600 0 0 Z N"/>
        </draw:custom-shape>
        <draw:frame draw:style-name="gr8" draw:text-style-name="P10" draw:layer="layout" svg:width="86.73cm" svg:height="4.027cm" svg:x="1.935cm" svg:y="88.048cm">
          <draw:text-box>
            <text:p text:style-name="P9"><text:span text:style-name="T9">The work at Stony Brook was supported by DOE/Office of Nuclear Physics grant DE-FG02-87ER40317. </text:span></text:p>
            <text:p text:style-name="P9"><text:span text:style-name="T9">This research was supported by the Exascale Computing Project (17-SC-20-SC), a collaborative effort of the U.S. Department of Energy Office of Science and the National Nuclear Security Administration.</text:span></text:p>
          </draw:text-box>
        </draw:frame>
        <draw:custom-shape draw:style-name="gr9" draw:text-style-name="P1" draw:layer="layout" svg:width="34.356cm" svg:height="24.795cm" svg:x="1.839cm" svg:y="14.575cm">
          <text:p/>
          <draw:enhanced-geometry svg:viewBox="0 0 21600 21600" draw:mirror-horizontal="false" draw:mirror-vertical="false" draw:type="rectangle" draw:enhanced-path="M 0 0 L 21600 0 21600 21600 0 21600 0 0 Z N"/>
        </draw:custom-shape>
        <draw:frame draw:style-name="gr6" draw:text-style-name="P7" draw:layer="layout" svg:width="16.993cm" svg:height="2.794cm" svg:x="102.87cm" svg:y="87.812cm">
          <draw:image xlink:href="Pictures/10000001000004A0000000C8ACA3E62C.png" xlink:type="simple" xlink:show="embed" xlink:actuate="onLoad" draw:mime-type="image/png">
            <text:p/>
          </draw:image>
        </draw:frame>
        <draw:custom-shape draw:style-name="gr10" draw:text-style-name="P4" draw:layer="layout" svg:width="19.199cm" svg:height="3.126cm" svg:x="9.398cm" svg:y="13cm">
          <text:p text:style-name="P3"><text:span text:style-name="T1">INTR</text:span><text:span text:style-name="T1">ODU</text:span><text:span text:style-name="T1">CTIO</text:span><text:span text:style-name="T1">N</text:span></text:p>
          <draw:enhanced-geometry svg:viewBox="0 0 21600 21600" draw:type="rectangle" draw:enhanced-path="M 0 0 L 21600 0 21600 21600 0 21600 0 0 Z N"/>
        </draw:custom-shape>
        <draw:custom-shape draw:style-name="gr11" draw:text-style-name="P1" draw:layer="layout" svg:width="49.63cm" svg:height="26.721cm" svg:x="38cm" svg:y="14.58cm">
          <text:p/>
          <draw:enhanced-geometry svg:viewBox="0 0 21600 21600" draw:type="rectangle" draw:enhanced-path="M 0 0 L 21600 0 21600 21600 0 21600 0 0 Z N"/>
        </draw:custom-shape>
        <draw:custom-shape draw:style-name="gr12" draw:text-style-name="P12" draw:layer="layout" svg:width="32.385cm" svg:height="3.175cm" svg:x="46.665cm" svg:y="13cm">
          <text:p text:style-name="P11"><text:span text:style-name="T10">NSE </text:span><text:span text:style-name="T10">EVO</text:span><text:span text:style-name="T10">LUTI</text:span><text:span text:style-name="T10">ON </text:span><text:span text:style-name="T10">SCH</text:span><text:span text:style-name="T10">EMA</text:span><text:span text:style-name="T10">TIC </text:span><text:span text:style-name="T10">DIAG</text:span><text:span text:style-name="T10">RAM</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82.093cm" svg:height="42.545cm" svg:x="38cm" svg:y="43.18cm">
          <text:p/>
          <draw:enhanced-geometry svg:viewBox="0 0 21600 21600" draw:mirror-horizontal="false" draw:mirror-vertical="false" draw:type="rectangle" draw:enhanced-path="M 0 0 L 21600 0 21600 21600 0 21600 0 0 Z N"/>
        </draw:custom-shape>
        <draw:custom-shape draw:style-name="gr14" draw:text-style-name="P12" draw:layer="layout" svg:width="24.765cm" svg:height="3.023cm" svg:x="66.675cm" svg:y="41.68cm">
          <text:p text:style-name="P11"><text:span text:style-name="T10">TEST </text:span><text:span text:style-name="T10">PRO</text:span><text:span text:style-name="T10">BLE</text:span><text:span text:style-name="T10">M</text:span></text:p>
          <draw:enhanced-geometry svg:viewBox="0 0 21600 21600" draw:type="rectangle" draw:enhanced-path="M 0 0 L 21600 0 21600 21600 0 21600 0 0 Z N"/>
        </draw:custom-shape>
        <draw:frame draw:style-name="gr15" draw:text-style-name="P13" draw:layer="layout" svg:width="32.92cm" svg:height="24.43cm" svg:x="2.54cm" svg:y="15.575cm">
          <draw:text-box>
            <text:p><text:span text:style-name="T11">Due to the stiff nature of solving reaction equations for simulating thermonuclear explosions, i.e. Type Ia SN and X-ray bursts, these simulations require careful coupling of hydrodynamics and reactions to avoid being limited by the nuclear reaction timescale instead of hydrodynamic timescale. But as temperature reaches beyond ~ 6 billion Kelvin, numerical integration becomes even more challenging when the timescale of the composition to reach statistical equilibrium is much shorter than the sound crossing time. Inspired by earlier work [1, 2] in the community at adaptively evaluating the nuclear statistical equilibrium (NSE) conditions, we have implemented an adaptive NSE method in our simplified spectral-deferred-corrections (SDC) [3] coupling of hydrodynamics and reactions. This can seamlessly transition from integrating a network to imposing the equilibrium during the reaction update of a simulation.</text:span></text:p>
            <text:p><text:span text:style-name="T11"/></text:p>
            <text:p><text:span text:style-name="T11">In this work, we demonstrate the recent effort of implementing an adaptive NSE algorithm in Castro/Microphysics code. We will show case its viability using a 2D sub-chandrasekhar double-detonation progenitor model for type Ia SN.</text:span></text:p>
          </draw:text-box>
        </draw:frame>
        <draw:custom-shape draw:style-name="gr16" draw:text-style-name="P1" draw:layer="layout" svg:width="34.29cm" svg:height="7.62cm" svg:x="1.905cm" svg:y="64.135cm">
          <text:p/>
          <draw:enhanced-geometry svg:viewBox="0 0 21600 21600" draw:mirror-horizontal="false" draw:mirror-vertical="false" draw:type="rectangle" draw:enhanced-path="M 0 0 L 21600 0 21600 21600 0 21600 0 0 Z N"/>
        </draw:custom-shape>
        <draw:custom-shape draw:style-name="gr10" draw:text-style-name="P4" draw:layer="layout" svg:width="19.199cm" svg:height="3.126cm" svg:x="9.474cm" svg:y="62.614cm">
          <text:p text:style-name="P3"><text:span text:style-name="T1">REF</text:span><text:span text:style-name="T1">ERE</text:span><text:span text:style-name="T1">NCE</text:span><text:span text:style-name="T1">S</text:span></text:p>
          <draw:enhanced-geometry svg:viewBox="0 0 21600 21600" draw:mirror-horizontal="false" draw:mirror-vertical="false" draw:type="rectangle" draw:enhanced-path="M 0 0 L 21600 0 21600 21600 0 21600 0 0 Z N"/>
        </draw:custom-shape>
        <draw:frame draw:style-name="gr17" draw:text-style-name="P15" draw:layer="layout" svg:width="32.918cm" svg:height="6.857cm" svg:x="2.642cm" svg:y="64.705cm">
          <draw:text-box>
            <text:p text:style-name="P14"><text:span text:style-name="T12">[1] Kushnir, D., &amp; Katz, B. (2020). DOI: 10.1093/mnras/staa594</text:span></text:p>
            <text:p text:style-name="P14"><text:span text:style-name="T12">[2] Lippuner, J., &amp; Roberts, L. (2018). DOI: 10.3847/1538-4365/aa94cb</text:span></text:p>
            <text:p text:style-name="P14"><text:span text:style-name="T12">[3] Zingale, M., Katz, M. P., Nonaka, A., &amp; Rasmussen, M. (2022). DOI: 10.3847/1538-4357/ac8478</text:span></text:p>
            <text:p text:style-name="P14"><text:span text:style-name="T12">[4] Zingale, M., Chen, Z., Rasmussen, M., Polin, A., Katz, M. P., Clark, A., S., &amp; Johnson, E. (2024). DOI:  10.3847/1538-4357/ad3441</text:span></text:p>
          </draw:text-box>
        </draw:frame>
        <draw:custom-shape draw:style-name="gr18" draw:text-style-name="P1" draw:layer="layout" svg:width="34.309cm" svg:height="12.7cm" svg:x="1.905cm" svg:y="73.025cm">
          <text:p/>
          <draw:enhanced-geometry svg:viewBox="0 0 21600 21600" draw:mirror-horizontal="false" draw:mirror-vertical="false" draw:type="rectangle" draw:enhanced-path="M 0 0 L 21600 0 21600 21600 0 21600 0 0 Z N"/>
        </draw:custom-shape>
        <draw:custom-shape draw:style-name="gr19" draw:text-style-name="P4" draw:layer="layout" svg:width="14.062cm" svg:height="3.126cm" svg:x="11.973cm" svg:y="72.39cm">
          <text:p text:style-name="P3"><text:span text:style-name="T1">COD</text:span><text:span text:style-name="T1">E</text:span></text:p>
          <draw:enhanced-geometry svg:viewBox="0 0 21600 21600" draw:type="rectangle" draw:enhanced-path="M 0 0 L 21600 0 21600 21600 0 21600 0 0 Z N"/>
        </draw:custom-shape>
        <draw:frame draw:style-name="gr20" draw:text-style-name="P16" draw:layer="layout" svg:width="23.59cm" svg:height="4.975cm" svg:x="11.335cm" svg:y="75.565cm">
          <draw:text-box>
            <text:p text:style-name="P9"><text:span text:style-name="T13">| <text:s text:c="2"/>https://github.com/AMReX-Astro/Castro</text:span></text:p>
            <text:p text:style-name="P9"><text:span text:style-name="T13">| <text:s text:c="2"/>https://github.com/AMReX-Astro/Microphysics</text:span></text:p>
            <text:p text:style-name="P9"><text:span text:style-name="T13">| <text:s text:c="2"/>https://github.com/pynucastro/pynucastro</text:span></text:p>
          </draw:text-box>
        </draw:frame>
        <draw:frame draw:style-name="gr6" draw:text-style-name="P7" draw:layer="layout" svg:width="5.08cm" svg:height="5.2cm" svg:x="5.715cm" svg:y="79.375cm">
          <draw:image xlink:href="Pictures/10000001000001550000015DBAE51BF3.png" xlink:type="simple" xlink:show="embed" xlink:actuate="onLoad" draw:mime-type="image/png">
            <text:p/>
          </draw:image>
        </draw:frame>
        <draw:frame draw:style-name="gr21" draw:text-style-name="P17" draw:layer="layout" svg:width="17.965cm" svg:height="4.502cm" svg:x="12.261cm" svg:y="79.693cm">
          <draw:text-box>
            <text:p><text:span text:style-name="T14">New Contributions </text:span></text:p>
            <text:p><text:span text:style-name="T14">Are Welcome!</text:span></text:p>
          </draw:text-box>
        </draw:frame>
        <draw:frame draw:style-name="gr22" draw:text-style-name="P19" draw:layer="layout" svg:width="9.525cm" svg:height="3.81cm" svg:x="1.475cm" svg:y="75.565cm">
          <draw:text-box>
            <text:p text:style-name="P18"><text:span text:style-name="T13"><text:tab/></text:span><text:span text:style-name="T13"><text:tab/></text:span><text:span text:style-name="T13"> <text:s/>Castro</text:span></text:p>
            <text:p text:style-name="P18"><text:span text:style-name="T13">Microphysics</text:span></text:p>
            <text:p text:style-name="P18"><text:span text:style-name="T13"><text:tab/></text:span><text:span text:style-name="T13">Pynucastro</text:span></text:p>
          </draw:text-box>
        </draw:frame>
        <draw:frame draw:style-name="gr23" draw:text-style-name="P21" draw:layer="layout" svg:width="33.02cm" svg:height="9.699cm" svg:x="2.49cm" svg:y="42.107cm">
          <draw:text-box>
            <text:p text:style-name="P20"><text:span text:style-name="T15">Nuclear Statistical Equilibrium</text:span><text:span text:style-name="T13">: An equilibrium state of the system where the forward and reverse strong reactions are in chemical equilibrium. By imposing chemical equilibrium, one can derive the equation, Eq. 1, of determining the composition in NSE subject to two constraints, conservation of mass (Eq. 2) and charge (Eq. 3) given</text:span></text:p>
            <text:p text:style-name="P14"><text:span text:style-name="T13">(T, <text:s text:c="3"/>, <text:s text:c="3"/>). So, we can do an algebraic solve (we use Hybrid-Powell Method) to avoid the expensive integration!</text:span></text:p>
            <text:p/>
          </draw:text-box>
        </draw:frame>
        <draw:frame draw:style-name="gr6" draw:text-style-name="P7" draw:layer="layout" svg:width="31.899cm" svg:height="3.29cm" svg:x="3.111cm" svg:y="51.435cm">
          <draw:image xlink:href="Pictures/1000F6A10000239B000003AD48D7B5DF.svg" xlink:type="simple" xlink:show="embed" xlink:actuate="onLoad" draw:mime-type="image/svg+xml">
            <text:p/>
          </draw:image>
          <draw:image xlink:href="Pictures/100000010000018000000028520E9889.png" xlink:type="simple" xlink:show="embed" xlink:actuate="onLoad" draw:mime-type="image/png"/>
          <svg:title>TexMaths</svg:title>
          <svg:desc>35§display§X_i = \frac{m_i}{\rho}g_i \left(\frac{2\pi m_i k_B T}{h^2} \right)^{3/2} \exp{\left(\frac{Z_i \mu_p + N_i \mu_n + Q_i - \mu^C_i}{k_B T} \right)}§svg§600§TRUE§</svg:desc>
        </draw:frame>
        <draw:frame draw:style-name="gr24" draw:text-style-name="P22" draw:layer="layout" svg:width="30.48cm" svg:height="1.905cm" svg:x="4.41cm" svg:y="55.18cm">
          <draw:text-box>
            <text:p><text:span text:style-name="T16">Eq. 1</text:span><text:span text:style-name="T17">: NSE Composition Equation with two unknowns: <text:s text:c="6"/>and </text:span></text:p>
          </draw:text-box>
        </draw:frame>
        <draw:frame draw:style-name="gr6" draw:text-style-name="P7" draw:layer="layout" svg:width="1.044cm" svg:height="0.765cm" svg:x="28.754cm" svg:y="55.667cm">
          <draw:image xlink:href="Pictures/10000EBC0000015D00000100F25F0BC5.svg" xlink:type="simple" xlink:show="embed" xlink:actuate="onLoad" draw:mime-type="image/svg+xml">
            <text:p/>
          </draw:image>
          <draw:image xlink:href="Pictures/100000010000000F0000000B49D762B5.png" xlink:type="simple" xlink:show="embed" xlink:actuate="onLoad" draw:mime-type="image/png"/>
          <svg:title>TexMaths</svg:title>
          <svg:desc>30§display§\mu_p§svg§600§TRUE§</svg:desc>
        </draw:frame>
        <draw:frame draw:style-name="gr6" draw:text-style-name="P7" draw:layer="layout" svg:width="1.119cm" svg:height="0.69cm" svg:x="32.331cm" svg:y="55.686cm">
          <draw:image xlink:href="Pictures/10000EE700000176000000E7278F6119.svg" xlink:type="simple" xlink:show="embed" xlink:actuate="onLoad" draw:mime-type="image/svg+xml">
            <text:p/>
          </draw:image>
          <draw:image xlink:href="Pictures/10000001000000100000000A9E44A9D7.png" xlink:type="simple" xlink:show="embed" xlink:actuate="onLoad" draw:mime-type="image/png"/>
          <svg:title>TexMaths</svg:title>
          <svg:desc>30§display§\mu_n§svg§600§TRUE§</svg:desc>
        </draw:frame>
        <draw:frame draw:style-name="gr6" draw:text-style-name="P7" draw:layer="layout" svg:width="5.297cm" svg:height="1.117cm" svg:x="6.986cm" svg:y="57.786cm">
          <draw:image xlink:href="Pictures/10001C9C0000057300000127B9E22244.svg" xlink:type="simple" xlink:show="embed" xlink:actuate="onLoad" draw:mime-type="image/svg+xml">
            <text:p/>
          </draw:image>
          <draw:image xlink:href="Pictures/100000010000003B0000000C479FD445.png" xlink:type="simple" xlink:show="embed" xlink:actuate="onLoad" draw:mime-type="image/png"/>
          <svg:title>TexMaths</svg:title>
          <svg:desc>38§display§\Sigma_i X_i = 1§svg§600§TRUE§</svg:desc>
        </draw:frame>
        <draw:frame draw:style-name="gr6" draw:text-style-name="P7" draw:layer="layout" svg:width="7.629cm" svg:height="2.96cm" svg:x="22.861cm" svg:y="56.888cm">
          <draw:image xlink:href="Pictures/10003BE10000080F00000321990DD6FD.svg" xlink:type="simple" xlink:show="embed" xlink:actuate="onLoad" draw:mime-type="image/svg+xml">
            <text:p/>
          </draw:image>
          <draw:image xlink:href="Pictures/100000010000005700000022F3B42B47.png" xlink:type="simple" xlink:show="embed" xlink:actuate="onLoad" draw:mime-type="image/png"/>
          <svg:title>TexMaths</svg:title>
          <svg:desc>37§display§Y_e = \Sigma_i \frac{Z_i}{A_i}X_i§svg§600§TRUE§</svg:desc>
        </draw:frame>
        <draw:frame draw:style-name="gr25" draw:text-style-name="P22" draw:layer="layout" svg:width="14.605cm" svg:height="2.453cm" svg:x="3.175cm" svg:y="59.608cm">
          <draw:text-box>
            <text:p><text:span text:style-name="T16">Eq. 2</text:span><text:span text:style-name="T17">: Conservation of baryon #</text:span></text:p>
          </draw:text-box>
        </draw:frame>
        <draw:frame draw:style-name="gr26" draw:text-style-name="P22" draw:layer="layout" svg:width="14.605cm" svg:height="1.352cm" svg:x="19.635cm" svg:y="59.608cm">
          <draw:text-box>
            <text:p><text:span text:style-name="T16">Eq. 3</text:span><text:span text:style-name="T17"> : Conservation of charge.</text:span></text:p>
          </draw:text-box>
        </draw:frame>
        <draw:custom-shape draw:style-name="gr27" draw:text-style-name="P1" draw:layer="layout" svg:width="33.02cm" svg:height="10.795cm" svg:x="2.54cm" svg:y="50.8cm">
          <text:p/>
          <draw:enhanced-geometry svg:viewBox="0 0 21600 21600" draw:mirror-horizontal="false" draw:mirror-vertical="false" draw:type="rectangle" draw:enhanced-path="M 0 0 L 21600 0 21600 21600 0 21600 0 0 Z N"/>
        </draw:custom-shape>
        <draw:frame draw:style-name="gr24" draw:text-style-name="P24" draw:layer="layout" svg:width="7.62cm" svg:height="1.905cm" svg:x="59.555cm" svg:y="16.684cm">
          <draw:text-box>
            <text:p text:style-name="P23"><text:span text:style-name="T13">Enters Burner</text:span></text:p>
          </draw:text-box>
        </draw:frame>
        <draw:frame draw:style-name="gr28" draw:text-style-name="P25" draw:layer="layout" svg:width="10.16cm" svg:height="1.705cm" svg:x="58.185cm" svg:y="23.161cm">
          <draw:text-box>
            <text:p text:style-name="P23">Min Temp Check</text:p>
          </draw:text-box>
        </draw:frame>
        <draw:frame draw:style-name="gr29" draw:text-style-name="P26" draw:layer="layout" svg:width="10.16cm" svg:height="1.57cm" svg:x="75.635cm" svg:y="28.249cm">
          <draw:text-box>
            <text:p>Burn via Integration</text:p>
          </draw:text-box>
        </draw:frame>
        <draw:frame draw:style-name="gr6" draw:text-style-name="P7" draw:layer="layout" svg:width="0.525cm" svg:height="0.69cm" svg:x="4.335cm" svg:y="48.448cm">
          <draw:image xlink:href="Pictures/10000562000000B0000000E7DA4468C4.svg" xlink:type="simple" xlink:show="embed" xlink:actuate="onLoad" draw:mime-type="image/svg+xml">
            <text:p/>
          </draw:image>
          <draw:image xlink:href="Pictures/10000001000000070000000A11791A97.png" xlink:type="simple" xlink:show="embed" xlink:actuate="onLoad" draw:mime-type="image/png"/>
          <svg:title>TexMaths</svg:title>
          <svg:desc>30§display§\rho§svg§600§TRUE§</svg:desc>
        </draw:frame>
        <draw:frame draw:style-name="gr6" draw:text-style-name="P7" draw:layer="layout" svg:width="0.975cm" svg:height="0.882cm" svg:x="5.51cm" svg:y="48.353cm">
          <draw:image xlink:href="Pictures/10000CBB0000014600000127E1AC8678.svg" xlink:type="simple" xlink:show="embed" xlink:actuate="onLoad" draw:mime-type="image/svg+xml">
            <text:p/>
          </draw:image>
          <draw:image xlink:href="Pictures/100000010000000E0000000C7B3A37EE.png" xlink:type="simple" xlink:show="embed" xlink:actuate="onLoad" draw:mime-type="image/png"/>
          <svg:title>TexMaths</svg:title>
          <svg:desc>30§display§Y_e§svg§600§TRUE§</svg:desc>
        </draw:frame>
        <draw:custom-shape draw:style-name="gr30" draw:text-style-name="P1" draw:layer="layout" svg:width="10.795cm" svg:height="1.905cm" svg:x="57.885cm" svg:y="22.9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1" draw:text-style-name="P7" draw:layer="layout" svg:x1="53.975cm" svg:y1="15.614cm" svg:x2="59.055cm" svg:y2="16.249cm">
          <text:p/>
        </draw:line>
        <draw:line draw:style-name="gr32" draw:text-style-name="P7" draw:layer="layout" svg:x1="63.3cm" svg:y1="20.294cm" svg:x2="63.3cm" svg:y2="22.834cm">
          <text:p/>
        </draw:line>
        <draw:frame draw:style-name="gr33" draw:text-style-name="P25" draw:layer="layout" svg:width="10.16cm" svg:height="2.613cm" svg:x="58.185cm" svg:y="27.741cm">
          <draw:text-box>
            <text:p text:style-name="P23">Mass Abundance Check</text:p>
          </draw:text-box>
        </draw:frame>
        <draw:custom-shape draw:style-name="gr34" draw:text-style-name="P1" draw:layer="layout" svg:width="10.795cm" svg:height="2.578cm" svg:x="57.885cm" svg:y="27.7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63.3cm" svg:y1="25.501cm" svg:x2="63.3cm" svg:y2="27.406cm">
          <text:p/>
        </draw:line>
        <draw:frame draw:style-name="gr24" draw:text-style-name="P25" draw:layer="layout" svg:width="10.16cm" svg:height="1.905cm" svg:x="58.185cm" svg:y="33.356cm">
          <draw:text-box>
            <text:p text:style-name="P23">NSE Grouping</text:p>
          </draw:text-box>
        </draw:frame>
        <draw:custom-shape draw:style-name="gr35" draw:text-style-name="P1" draw:layer="layout" svg:width="10.795cm" svg:height="2.105cm" svg:x="57.885cm" svg:y="33.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63.3cm" svg:y1="30.916cm" svg:x2="63.3cm" svg:y2="32.821cm">
          <text:p/>
        </draw:line>
        <draw:frame draw:style-name="gr36" draw:text-style-name="P27" draw:layer="layout" svg:width="3.175cm" svg:height="1.432cm" svg:x="60.49cm" svg:y="20.894cm">
          <draw:text-box>
            <text:p text:style-name="P9"><text:span text:style-name="T18">YES</text:span></text:p>
          </draw:text-box>
        </draw:frame>
        <draw:frame draw:style-name="gr36" draw:text-style-name="P25" draw:layer="layout" svg:width="3.175cm" svg:height="1.432cm" svg:x="60.091cm" svg:y="25.724cm">
          <draw:text-box>
            <text:p text:style-name="P23">YES</text:p>
          </draw:text-box>
        </draw:frame>
        <draw:frame draw:style-name="gr36" draw:text-style-name="P25" draw:layer="layout" svg:width="3.175cm" svg:height="1.432cm" svg:x="60.091cm" svg:y="31.124cm">
          <draw:text-box>
            <text:p text:style-name="P23">YES</text:p>
          </draw:text-box>
        </draw:frame>
        <draw:frame draw:style-name="gr24" draw:text-style-name="P25" draw:layer="layout" svg:width="10.16cm" svg:height="1.905cm" svg:x="58.185cm" svg:y="38.236cm">
          <draw:text-box>
            <text:p text:style-name="P23">Is in NSE?</text:p>
          </draw:text-box>
        </draw:frame>
        <draw:custom-shape draw:style-name="gr37" draw:text-style-name="P1" draw:layer="layout" svg:width="10.795cm" svg:height="1.943cm" svg:x="57.885cm" svg:y="38.0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63.3cm" svg:y1="35.796cm" svg:x2="63.3cm" svg:y2="37.701cm">
          <text:p/>
        </draw:line>
        <draw:frame draw:style-name="gr36" draw:text-style-name="P25" draw:layer="layout" svg:width="3.175cm" svg:height="1.432cm" svg:x="60.091cm" svg:y="36.104cm">
          <draw:text-box>
            <text:p text:style-name="P23">YES</text:p>
          </draw:text-box>
        </draw:frame>
        <draw:frame draw:style-name="gr36" draw:text-style-name="P28" draw:layer="layout" svg:width="6.35cm" svg:height="1.432cm" svg:x="63.57cm" svg:y="19.894cm">
          <draw:text-box>
            <text:p text:style-name="P23"><text:span text:style-name="T19">NSE Check</text:span></text:p>
          </draw:text-box>
        </draw:frame>
        <draw:custom-shape draw:style-name="gr38" draw:text-style-name="P1" draw:layer="layout" svg:width="16.51cm" svg:height="7.62cm" svg:x="38.735cm" svg:y="26.905cm">
          <text:p/>
          <draw:enhanced-geometry svg:viewBox="0 0 21600 21600" draw:text-areas="800 800 20800 20800" draw:type="round-rectangular-callout" draw:modifiers="23744.1705529647 18298.0711192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39" draw:text-style-name="P1" draw:layer="layout" svg:width="17.245cm" svg:height="3.175cm" svg:x="38.735cm" svg:y="21.59cm">
          <text:p/>
          <draw:enhanced-geometry svg:viewBox="0 0 21600 21600" draw:mirror-horizontal="false" draw:mirror-vertical="false" draw:text-areas="800 800 20800 20800" draw:type="round-rectangular-callout" draw:modifiers="23595.1756929143 34916.37279596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40" draw:text-style-name="P1" draw:layer="layout" svg:width="11.43cm" svg:height="3.149cm" svg:x="42.545cm" svg:y="17.346cm">
          <text:p/>
          <draw:enhanced-geometry svg:viewBox="0 0 21600 21600" draw:text-areas="800 800 20800 20800" draw:type="round-rectangular-callout" draw:modifiers="30195.7833960283 28909.7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41" draw:text-style-name="P25" draw:layer="layout" svg:width="10.795cm" svg:height="3.201cm" svg:x="42.772cm" svg:y="17.619cm">
          <draw:text-box>
            <text:p text:style-name="P23">User-setting param,</text:p>
            <text:p text:style-name="P23"><text:s/>4 GK by default.</text:p>
          </draw:text-box>
        </draw:frame>
        <draw:frame draw:style-name="gr42" draw:text-style-name="P25" draw:layer="layout" svg:width="16.51cm" svg:height="7.62cm" svg:x="38.735cm" svg:y="27.105cm">
          <draw:text-box>
            <text:p text:style-name="P23">Check all pairs of forward and reverse rates, then group reactants and products together if forward and reverse rates are in equilibrium and faster compared to sound-crossing time.</text:p>
          </draw:text-box>
        </draw:frame>
        <draw:frame draw:style-name="gr43" draw:text-style-name="P25" draw:layer="layout" svg:width="17.145cm" svg:height="2.775cm" svg:x="38.965cm" svg:y="21.79cm">
          <draw:text-box>
            <text:p text:style-name="P23">Mass fractions do not differ significantly from NSE composition</text:p>
          </draw:text-box>
        </draw:frame>
        <draw:custom-shape draw:style-name="gr44" draw:text-style-name="P1" draw:layer="layout" svg:width="9.425cm" svg:height="3.149cm" svg:x="58.52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10.16cm" svg:height="3.81cm" svg:x="75.335cm" svg:y="2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7" draw:layer="layout" svg:x1="71.285cm" svg:y1="39.209cm" svg:x2="74.795cm" svg:y2="39.209cm">
          <text:p/>
        </draw:line>
        <draw:line draw:style-name="gr47" draw:text-style-name="P7" draw:layer="layout" svg:x1="72.19cm" svg:y1="28.811cm" svg:x2="74.73cm" svg:y2="28.811cm">
          <text:p/>
        </draw:line>
        <draw:frame draw:style-name="gr36" draw:text-style-name="P26" draw:layer="layout" svg:width="2.54cm" svg:height="1.432cm" svg:x="72.59cm" svg:y="27.079cm">
          <draw:text-box>
            <text:p>NO</text:p>
          </draw:text-box>
        </draw:frame>
        <draw:frame draw:style-name="gr36" draw:text-style-name="P26" draw:layer="layout" svg:width="3.175cm" svg:height="1.432cm" svg:x="71.42cm" svg:y="37.439cm">
          <draw:text-box>
            <text:p>YES</text:p>
          </draw:text-box>
        </draw:frame>
        <draw:custom-shape draw:style-name="gr48" draw:text-style-name="P29" draw:layer="layout" svg:width="9.89cm" svg:height="2.105cm" svg:x="75.5cm" svg:y="37.974cm">
          <text:p text:style-name="P23">NSE Burn via RK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9" draw:text-style-name="P7" draw:layer="layout" svg:x1="80.28cm" svg:y1="21.899cm" svg:x2="80.28cm" svg:y2="26.471cm">
          <text:p/>
        </draw:line>
        <draw:line draw:style-name="gr50" draw:text-style-name="P7" draw:layer="layout" svg:x1="80.28cm" svg:y1="21.999cm" svg:x2="68.145cm" svg:y2="21.999cm">
          <text:p/>
        </draw:line>
        <draw:frame draw:style-name="gr51" draw:text-style-name="P25" draw:layer="layout" svg:width="9.525cm" svg:height="3.794cm" svg:x="71.56cm" svg:y="17.716cm">
          <draw:text-box>
            <text:p text:style-name="P23"><text:span text:style-name="T19">Burn Failure</text:span>:</text:p>
            <text:p text:style-name="P23">Is it because we entered NSE?</text:p>
          </draw:text-box>
        </draw:frame>
        <draw:custom-shape draw:style-name="gr52" draw:text-style-name="P1" draw:layer="layout" svg:width="14.605cm" svg:height="4.446cm" svg:x="39.07cm" svg:y="35.96cm">
          <text:p/>
          <draw:enhanced-geometry svg:viewBox="0 0 21600 21600" draw:mirror-horizontal="false" draw:mirror-vertical="false" draw:text-areas="800 800 20800 20800" draw:type="round-rectangular-callout" draw:modifiers="25434.6432972751 16193.9284911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53" draw:text-style-name="P26" draw:layer="layout" svg:width="14.04cm" svg:height="3.811cm" svg:x="39.635cm" svg:y="36.295cm">
          <draw:text-box>
            <text:p>Check final grouping configuration to determine whether we’re in NSE or not.</text:p>
          </draw:text-box>
        </draw:frame>
        <draw:line draw:style-name="gr54" draw:text-style-name="P7" draw:layer="layout" svg:x1="80.31cm" svg:y1="31.55cm" svg:x2="80.31cm" svg:y2="37.265cm">
          <text:p/>
        </draw:line>
        <draw:line draw:style-name="gr55" draw:text-style-name="P7" draw:layer="layout" svg:x1="80.31cm" svg:y1="34.29cm" svg:x2="86.995cm" svg:y2="34.29cm">
          <text:p/>
        </draw:line>
        <draw:frame draw:style-name="gr56" draw:text-style-name="P30" draw:layer="layout" svg:width="6.35cm" svg:height="2.613cm" svg:x="80.645cm" svg:y="31.677cm">
          <draw:text-box>
            <text:p text:style-name="P9"><text:span text:style-name="T19">Successful </text:span></text:p>
            <text:p text:style-name="P23"><text:span text:style-name="T19">Burn</text:span></text:p>
          </draw:text-box>
        </draw:frame>
        <draw:custom-shape draw:style-name="gr57" draw:text-style-name="P1" draw:layer="layout" svg:width="31.18cm" svg:height="26.721cm" svg:x="88.9cm" svg:y="14.605cm">
          <text:p/>
          <draw:enhanced-geometry svg:viewBox="0 0 21600 21600" draw:type="rectangle" draw:enhanced-path="M 0 0 L 21600 0 21600 21600 0 21600 0 0 Z N"/>
        </draw:custom-shape>
        <draw:custom-shape draw:style-name="gr58" draw:text-style-name="P12" draw:layer="layout" svg:width="16.445cm" svg:height="3.175cm" svg:x="96.59cm" svg:y="13.035cm">
          <text:p text:style-name="P11"><text:span text:style-name="T10">CON</text:span><text:span text:style-name="T10">VER</text:span><text:span text:style-name="T10">GEN</text:span><text:span text:style-name="T10">CE</text:span></text:p>
          <draw:enhanced-geometry svg:viewBox="0 0 21600 21600" draw:mirror-horizontal="false" draw:mirror-vertical="false" draw:type="rectangle" draw:enhanced-path="M 0 0 L 21600 0 21600 21600 0 21600 0 0 Z N"/>
        </draw:custom-shape>
        <draw:frame draw:style-name="gr59" draw:layer="layout" svg:width="30.201cm" svg:height="19.704cm" svg:x="89.507cm" svg:y="15.899cm">
          <table:table table:template-name="teal-dark"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31"><text:span text:style-name="T20">Field</text:span></text:p>
              </table:table-cell>
              <table:table-cell/>
              <table:table-cell table:style-name="ce1">
                <text:p text:style-name="P31"><text:span text:style-name="T20">rate</text:span></text:p>
              </table:table-cell>
              <table:table-cell/>
              <table:table-cell table:style-name="ce3">
                <text:p text:style-name="P31"><text:span text:style-name="T20">rate</text:span></text:p>
              </table:table-cell>
              <table:table-cell/>
              <table:table-cell table:style-name="ce3">
                <text:p text:style-name="P31"><text:span text:style-name="T20">rate</text:span></text:p>
              </table:table-cell>
              <table:table-cell/>
            </table:table-row>
            <table:table-row table:style-name="ro1" table:default-cell-style-name="ce2">
              <table:table-cell/>
              <table:table-cell table:style-name="ce4">
                <text:p text:style-name="P32"><text:span text:style-name="T21">3.58e+19</text:span></text:p>
              </table:table-cell>
              <table:table-cell>
                <text:p text:style-name="P33"><text:span text:style-name="T22">1.948</text:span></text:p>
              </table:table-cell>
              <table:table-cell>
                <text:p text:style-name="P33"><text:span text:style-name="T22">9.27e+18</text:span></text:p>
              </table:table-cell>
              <table:table-cell>
                <text:p text:style-name="P33"><text:span text:style-name="T22">2.033</text:span></text:p>
              </table:table-cell>
              <table:table-cell>
                <text:p text:style-name="P33"><text:span text:style-name="T22">2.27e+18</text:span></text:p>
              </table:table-cell>
              <table:table-cell>
                <text:p text:style-name="P33"><text:span text:style-name="T22">2.042</text:span></text:p>
              </table:table-cell>
              <table:table-cell>
                <text:p text:style-name="P33"><text:span text:style-name="T22">5.50e+17</text:span></text:p>
              </table:table-cell>
            </table:table-row>
            <table:table-row table:style-name="ro1" table:default-cell-style-name="ce2">
              <table:table-cell/>
              <table:table-cell>
                <text:p text:style-name="P33"><text:span text:style-name="T22">1.80e+28</text:span></text:p>
              </table:table-cell>
              <table:table-cell>
                <text:p text:style-name="P33"><text:span text:style-name="T22">1.03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1.80e+28</text:span></text:p>
              </table:table-cell>
              <table:table-cell>
                <text:p text:style-name="P33"><text:span text:style-name="T22">2.04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5.41e+37</text:span></text:p>
              </table:table-cell>
              <table:table-cell>
                <text:p text:style-name="P33"><text:span text:style-name="T22">1.955</text:span></text:p>
              </table:table-cell>
              <table:table-cell>
                <text:p text:style-name="P33"><text:span text:style-name="T22">1.39e+37</text:span></text:p>
              </table:table-cell>
              <table:table-cell>
                <text:p text:style-name="P33"><text:span text:style-name="T22">2.021</text:span></text:p>
              </table:table-cell>
              <table:table-cell>
                <text:p text:style-name="P33"><text:span text:style-name="T22">3.44e+36</text:span></text:p>
              </table:table-cell>
              <table:table-cell>
                <text:p text:style-name="P33"><text:span text:style-name="T22">1.999</text:span></text:p>
              </table:table-cell>
              <table:table-cell>
                <text:p text:style-name="P33"><text:span text:style-name="T22">8.60e+35</text:span></text:p>
              </table:table-cell>
            </table:table-row>
            <table:table-row table:style-name="ro1" table:default-cell-style-name="ce2">
              <table:table-cell/>
              <table:table-cell>
                <text:p text:style-name="P33"><text:span text:style-name="T22">5.33e+37</text:span></text:p>
              </table:table-cell>
              <table:table-cell>
                <text:p text:style-name="P33"><text:span text:style-name="T22">1.955</text:span></text:p>
              </table:table-cell>
              <table:table-cell>
                <text:p text:style-name="P33"><text:span text:style-name="T22">1.38e+37</text:span></text:p>
              </table:table-cell>
              <table:table-cell>
                <text:p text:style-name="P33"><text:span text:style-name="T22">2.022</text:span></text:p>
              </table:table-cell>
              <table:table-cell>
                <text:p text:style-name="P33"><text:span text:style-name="T22">3.39e+36</text:span></text:p>
              </table:table-cell>
              <table:table-cell>
                <text:p text:style-name="P33"><text:span text:style-name="T22">1.999</text:span></text:p>
              </table:table-cell>
              <table:table-cell>
                <text:p text:style-name="P33"><text:span text:style-name="T22">8.50e+35</text:span></text:p>
              </table:table-cell>
            </table:table-row>
            <table:table-row table:style-name="ro1" table:default-cell-style-name="ce2">
              <table:table-cell/>
              <table:table-cell>
                <text:p text:style-name="P33"><text:span text:style-name="T22">5.86e+20</text:span></text:p>
              </table:table-cell>
              <table:table-cell>
                <text:p text:style-name="P33"><text:span text:style-name="T22">2.000</text:span></text:p>
              </table:table-cell>
              <table:table-cell>
                <text:p text:style-name="P33"><text:span text:style-name="T22">1.46e+20</text:span></text:p>
              </table:table-cell>
              <table:table-cell>
                <text:p text:style-name="P33"><text:span text:style-name="T22">2.131</text:span></text:p>
              </table:table-cell>
              <table:table-cell>
                <text:p text:style-name="P33"><text:span text:style-name="T22">3.34e+19</text:span></text:p>
              </table:table-cell>
              <table:table-cell>
                <text:p text:style-name="P33"><text:span text:style-name="T22">2.278</text:span></text:p>
              </table:table-cell>
              <table:table-cell>
                <text:p text:style-name="P33"><text:span text:style-name="T22">6.90e+18</text:span></text:p>
              </table:table-cell>
            </table:table-row>
            <table:table-row table:style-name="ro1" table:default-cell-style-name="ce2">
              <table:table-cell/>
              <table:table-cell>
                <text:p text:style-name="P33"><text:span text:style-name="T22">2.83e+18</text:span></text:p>
              </table:table-cell>
              <table:table-cell>
                <text:p text:style-name="P33"><text:span text:style-name="T22">1.859</text:span></text:p>
              </table:table-cell>
              <table:table-cell>
                <text:p text:style-name="P33"><text:span text:style-name="T22">7.79e+17</text:span></text:p>
              </table:table-cell>
              <table:table-cell>
                <text:p text:style-name="P33"><text:span text:style-name="T22">2.014</text:span></text:p>
              </table:table-cell>
              <table:table-cell>
                <text:p text:style-name="P33"><text:span text:style-name="T22">1.93e+17</text:span></text:p>
              </table:table-cell>
              <table:table-cell>
                <text:p text:style-name="P33"><text:span text:style-name="T22">2.227</text:span></text:p>
              </table:table-cell>
              <table:table-cell>
                <text:p text:style-name="P33"><text:span text:style-name="T22">4.12e+16</text:span></text:p>
              </table:table-cell>
            </table:table-row>
            <table:table-row table:style-name="ro1" table:default-cell-style-name="ce2">
              <table:table-cell/>
              <table:table-cell>
                <text:p text:style-name="P33"><text:span text:style-name="T22">1.22e+18</text:span></text:p>
              </table:table-cell>
              <table:table-cell>
                <text:p text:style-name="P33"><text:span text:style-name="T22">2.041</text:span></text:p>
              </table:table-cell>
              <table:table-cell>
                <text:p text:style-name="P33"><text:span text:style-name="T22">2.98e+17</text:span></text:p>
              </table:table-cell>
              <table:table-cell>
                <text:p text:style-name="P33"><text:span text:style-name="T22">2.214</text:span></text:p>
              </table:table-cell>
              <table:table-cell>
                <text:p text:style-name="P33"><text:span text:style-name="T22">6.41e+16</text:span></text:p>
              </table:table-cell>
              <table:table-cell>
                <text:p text:style-name="P33"><text:span text:style-name="T22">2.242</text:span></text:p>
              </table:table-cell>
              <table:table-cell>
                <text:p text:style-name="P33"><text:span text:style-name="T22">1.36e+16</text:span></text:p>
              </table:table-cell>
            </table:table-row>
            <table:table-row table:style-name="ro1" table:default-cell-style-name="ce2">
              <table:table-cell/>
              <table:table-cell>
                <text:p text:style-name="P33"><text:span text:style-name="T22">1.43e+19</text:span></text:p>
              </table:table-cell>
              <table:table-cell>
                <text:p text:style-name="P33"><text:span text:style-name="T22">1.903</text:span></text:p>
              </table:table-cell>
              <table:table-cell>
                <text:p text:style-name="P33"><text:span text:style-name="T22">3.82e+18</text:span></text:p>
              </table:table-cell>
              <table:table-cell>
                <text:p text:style-name="P33"><text:span text:style-name="T22">1.999</text:span></text:p>
              </table:table-cell>
              <table:table-cell>
                <text:p text:style-name="P33"><text:span text:style-name="T22">9.55e+17</text:span></text:p>
              </table:table-cell>
              <table:table-cell>
                <text:p text:style-name="P33"><text:span text:style-name="T22">2.076</text:span></text:p>
              </table:table-cell>
              <table:table-cell>
                <text:p text:style-name="P33"><text:span text:style-name="T22">2.27e+17</text:span></text:p>
              </table:table-cell>
            </table:table-row>
            <table:table-row table:style-name="ro2" table:default-cell-style-name="ce2">
              <table:table-cell/>
              <table:table-cell>
                <text:p text:style-name="P33"><text:span text:style-name="T22">3.88e+20</text:span></text:p>
              </table:table-cell>
              <table:table-cell>
                <text:p text:style-name="P33"><text:span text:style-name="T22">2.038</text:span></text:p>
              </table:table-cell>
              <table:table-cell>
                <text:p text:style-name="P33"><text:span text:style-name="T22">9.44e+19</text:span></text:p>
              </table:table-cell>
              <table:table-cell>
                <text:p text:style-name="P33"><text:span text:style-name="T22">2.086</text:span></text:p>
              </table:table-cell>
              <table:table-cell>
                <text:p text:style-name="P33"><text:span text:style-name="T22">2.22e+19</text:span></text:p>
              </table:table-cell>
              <table:table-cell>
                <text:p text:style-name="P33"><text:span text:style-name="T22">2.228</text:span></text:p>
              </table:table-cell>
              <table:table-cell>
                <text:p text:style-name="P33"><text:span text:style-name="T22">4.74e+18</text:span></text:p>
              </table:table-cell>
            </table:table-row>
          </table:table>
          <draw:image xlink:href="Pictures/TablePreview1.svm" xlink:type="simple" xlink:show="embed" xlink:actuate="onLoad"/>
        </draw:frame>
        <draw:frame draw:style-name="gr6" draw:text-style-name="P7" draw:layer="layout" svg:width="2.997cm" svg:height="0.705cm" svg:x="94.315cm" svg:y="16.41cm">
          <draw:image xlink:href="Pictures/100017E1000003E8000000EC5C280E6C.svg" xlink:type="simple" xlink:show="embed" xlink:actuate="onLoad" draw:mime-type="image/svg+xml">
            <text:p/>
          </draw:image>
          <draw:image xlink:href="Pictures/100000010000002A0000000A3956CE18.png" xlink:type="simple" xlink:show="embed" xlink:actuate="onLoad" draw:mime-type="image/png"/>
          <svg:title>TexMaths</svg:title>
          <svg:desc>30§display§\epsilon_{32 \rightarrow 64}§svg§600§TRUE§</svg:desc>
        </draw:frame>
        <draw:frame draw:style-name="gr6" draw:text-style-name="P7" draw:layer="layout" svg:width="3.405cm" svg:height="0.705cm" svg:x="101.165cm" svg:y="16.44cm">
          <draw:image xlink:href="Pictures/100019C000000470000000EC214EC7F3.svg" xlink:type="simple" xlink:show="embed" xlink:actuate="onLoad" draw:mime-type="image/svg+xml">
            <text:p/>
          </draw:image>
          <draw:image xlink:href="Pictures/10000001000000300000000A074C679D.png" xlink:type="simple" xlink:show="embed" xlink:actuate="onLoad" draw:mime-type="image/png"/>
          <svg:title>TexMaths</svg:title>
          <svg:desc>30§display§\epsilon_{64 \rightarrow 128}§svg§600§TRUE§</svg:desc>
        </draw:frame>
        <draw:frame draw:style-name="gr6" draw:text-style-name="P7" draw:layer="layout" svg:width="3.747cm" svg:height="0.624cm" svg:x="108.185cm" svg:y="16.421cm">
          <draw:image xlink:href="Pictures/100020B1000004E2000000D196DC0FD0.svg" xlink:type="simple" xlink:show="embed" xlink:actuate="onLoad" draw:mime-type="image/svg+xml">
            <text:p/>
          </draw:image>
          <draw:image xlink:href="Pictures/1000000100000035000000096D1DCF2C.png" xlink:type="simple" xlink:show="embed" xlink:actuate="onLoad" draw:mime-type="image/png"/>
          <svg:title>TexMaths</svg:title>
          <svg:desc>30§display§\epsilon_{128 \rightarrow 256}§svg§600§TRUE§</svg:desc>
        </draw:frame>
        <draw:frame draw:style-name="gr6" draw:text-style-name="P7" draw:layer="layout" svg:width="3.819cm" svg:height="0.705cm" svg:x="115.394cm" svg:y="16.41cm">
          <draw:image xlink:href="Pictures/1000215B000004FA000000ECAC702237.svg" xlink:type="simple" xlink:show="embed" xlink:actuate="onLoad" draw:mime-type="image/svg+xml">
            <text:p/>
          </draw:image>
          <draw:image xlink:href="Pictures/10000001000000360000000A96FE200B.png" xlink:type="simple" xlink:show="embed" xlink:actuate="onLoad" draw:mime-type="image/png"/>
          <svg:title>TexMaths</svg:title>
          <svg:desc>30§display§\epsilon_{256 \rightarrow 512§svg§600§TRUE§</svg:desc>
        </draw:frame>
        <draw:frame draw:style-name="gr6" draw:text-style-name="P7" draw:layer="layout" svg:width="0.595cm" svg:height="0.782cm" svg:x="91.22cm" svg:y="18.234cm">
          <draw:image xlink:href="Pictures/10000562000000B0000000E7DA4468C4.svg" xlink:type="simple" xlink:show="embed" xlink:actuate="onLoad" draw:mime-type="image/svg+xml">
            <text:p/>
          </draw:image>
          <draw:image xlink:href="Pictures/10000001000000070000000A11791A97.png" xlink:type="simple" xlink:show="embed" xlink:actuate="onLoad" draw:mime-type="image/png"/>
          <svg:title>TexMaths</svg:title>
          <svg:desc>34§display§\rho§svg§600§TRUE§</svg:desc>
        </draw:frame>
        <draw:frame draw:style-name="gr6" draw:text-style-name="P7" draw:layer="layout" svg:width="1.265cm" svg:height="0.782cm" svg:x="90.931cm" svg:y="20.178cm">
          <draw:image xlink:href="Pictures/10000BE500000175000000E7B222FFCE.svg" xlink:type="simple" xlink:show="embed" xlink:actuate="onLoad" draw:mime-type="image/svg+xml">
            <text:p/>
          </draw:image>
          <draw:image xlink:href="Pictures/10000001000000100000000A367B8988.png" xlink:type="simple" xlink:show="embed" xlink:actuate="onLoad" draw:mime-type="image/png"/>
          <svg:title>TexMaths</svg:title>
          <svg:desc>34§display§\rho u§svg§600§TRUE§</svg:desc>
        </draw:frame>
        <draw:frame draw:style-name="gr6" draw:text-style-name="P7" draw:layer="layout" svg:width="1.265cm" svg:height="0.874cm" svg:x="90.931cm" svg:y="21.829cm">
          <draw:image xlink:href="Pictures/100009B60000017500000102BA777FA6.svg" xlink:type="simple" xlink:show="embed" xlink:actuate="onLoad" draw:mime-type="image/svg+xml">
            <text:p/>
          </draw:image>
          <draw:image xlink:href="Pictures/10000001000000100000000B72B59307.png" xlink:type="simple" xlink:show="embed" xlink:actuate="onLoad" draw:mime-type="image/png"/>
          <svg:title>TexMaths</svg:title>
          <svg:desc>34§display§\rho v§svg§600§TRUE§</svg:desc>
        </draw:frame>
        <draw:frame draw:style-name="gr6" draw:text-style-name="P7" draw:layer="layout" svg:width="1.618cm" svg:height="1.156cm" svg:x="90.771cm" svg:y="23.501cm">
          <draw:image xlink:href="Pictures/10000D13000001DD000001553599030A.svg" xlink:type="simple" xlink:show="embed" xlink:actuate="onLoad" draw:mime-type="image/svg+xml">
            <text:p/>
          </draw:image>
          <draw:image xlink:href="Pictures/10000001000000140000000EF4D08EBF.png" xlink:type="simple" xlink:show="embed" xlink:actuate="onLoad" draw:mime-type="image/png"/>
          <svg:title>TexMaths</svg:title>
          <svg:desc>34§display§\rho E§svg§600§TRUE§</svg:desc>
        </draw:frame>
        <draw:frame draw:style-name="gr6" draw:text-style-name="P7" draw:layer="layout" svg:width="1.217cm" svg:height="0.874cm" svg:x="90.973cm" svg:y="25.342cm">
          <draw:image xlink:href="Pictures/100008EF000001670000010202DA53F9.svg" xlink:type="simple" xlink:show="embed" xlink:actuate="onLoad" draw:mime-type="image/svg+xml">
            <text:p/>
          </draw:image>
          <draw:image xlink:href="Pictures/100000010000000F0000000B342C32BB.png" xlink:type="simple" xlink:show="embed" xlink:actuate="onLoad" draw:mime-type="image/png"/>
          <svg:title>TexMaths</svg:title>
          <svg:desc>34§display§\rho e§svg§600§TRUE§</svg:desc>
        </draw:frame>
        <draw:frame draw:style-name="gr6" draw:text-style-name="P7" draw:layer="layout" svg:width="0.689cm" svg:height="0.664cm" svg:x="91.137cm" svg:y="27.247cm">
          <draw:image xlink:href="Pictures/10000891000000F7000000EE23E5DC56.svg" xlink:type="simple" xlink:show="embed" xlink:actuate="onLoad" draw:mime-type="image/svg+xml">
            <text:p/>
          </draw:image>
          <draw:image xlink:href="Pictures/100000010000000A0000000AE273F221.png" xlink:type="simple" xlink:show="embed" xlink:actuate="onLoad" draw:mime-type="image/png"/>
          <svg:title>TexMaths</svg:title>
          <svg:desc>28§display§T§svg§600§TRUE§</svg:desc>
        </draw:frame>
        <draw:frame draw:style-name="gr6" draw:text-style-name="P7" draw:layer="layout" svg:width="3.758cm" svg:height="1.187cm" svg:x="89.817cm" svg:y="28.678cm">
          <draw:image xlink:href="Pictures/10001E3B0000053F000001A9B38077F5.svg" xlink:type="simple" xlink:show="embed" xlink:actuate="onLoad" draw:mime-type="image/svg+xml">
            <text:p/>
          </draw:image>
          <draw:image xlink:href="Pictures/100000010000003900000012FBF6CA27.png" xlink:type="simple" xlink:show="embed" xlink:actuate="onLoad" draw:mime-type="image/png"/>
          <svg:title>TexMaths</svg:title>
          <svg:desc>28§display§\rho X ({}^4\text{He})§svg§600§TRUE§</svg:desc>
        </draw:frame>
        <draw:frame draw:style-name="gr6" draw:text-style-name="P7" draw:layer="layout" svg:width="4.068cm" svg:height="1.187cm" svg:x="89.584cm" svg:y="30.537cm">
          <draw:image xlink:href="Pictures/1000224D000005AE000001A9D0196AC3.svg" xlink:type="simple" xlink:show="embed" xlink:actuate="onLoad" draw:mime-type="image/svg+xml">
            <text:p/>
          </draw:image>
          <draw:image xlink:href="Pictures/100000010000003D00000012EE52D9C2.png" xlink:type="simple" xlink:show="embed" xlink:actuate="onLoad" draw:mime-type="image/png"/>
          <svg:title>TexMaths</svg:title>
          <svg:desc>28§display§\rho X ({}^{48}\text{Cr})§svg§600§TRUE§</svg:desc>
        </draw:frame>
        <draw:frame draw:style-name="gr6" draw:text-style-name="P7" draw:layer="layout" svg:width="3.97cm" svg:height="1.182cm" svg:x="89.675cm" svg:y="32.238cm">
          <draw:image xlink:href="Pictures/100023700000058B000001A7432967CF.svg" xlink:type="simple" xlink:show="embed" xlink:actuate="onLoad" draw:mime-type="image/svg+xml">
            <text:p/>
          </draw:image>
          <draw:image xlink:href="Pictures/100000010000003C00000012389E6B45.png" xlink:type="simple" xlink:show="embed" xlink:actuate="onLoad" draw:mime-type="image/png"/>
          <svg:title>TexMaths</svg:title>
          <svg:desc>28§display§\rho X ({}^{52}\text{Fe})§svg§600§TRUE§</svg:desc>
        </draw:frame>
        <draw:frame draw:style-name="gr6" draw:text-style-name="P7" draw:layer="layout" svg:width="3.984cm" svg:height="1.182cm" svg:x="89.588cm" svg:y="33.988cm">
          <draw:image xlink:href="Pictures/1000250E00000590000001A72AC5E8A6.svg" xlink:type="simple" xlink:show="embed" xlink:actuate="onLoad" draw:mime-type="image/svg+xml">
            <text:p/>
          </draw:image>
          <draw:image xlink:href="Pictures/100000010000003C00000012A26FDABB.png" xlink:type="simple" xlink:show="embed" xlink:actuate="onLoad" draw:mime-type="image/png"/>
          <svg:title>TexMaths</svg:title>
          <svg:desc>28§display§\rho X ({}^{56}\text{Ni})§svg§600§TRUE§</svg:desc>
        </draw:frame>
        <draw:frame draw:style-name="gr60" draw:text-style-name="P26" draw:layer="layout" svg:width="29.845cm" svg:height="4.289cm" svg:x="90.17cm" svg:y="36.351cm">
          <draw:text-box>
            <text:p><text:span text:style-name="T23">Table 1</text:span>: This shows the convergence rates using the L<text:span text:style-name="T24">1 <text:s/></text:span><text:span text:style-name="T25">Norm for NSE convergence test problem along with simplified-SDC coupling. This shows that NSE burn is 2</text:span><text:span text:style-name="T26">nd</text:span><text:span text:style-name="T25"> order accurate.</text:span></text:p>
          </draw:text-box>
        </draw:frame>
        <draw:frame draw:style-name="gr6" draw:text-style-name="P7" draw:layer="layout" svg:width="5.28cm" svg:height="11.31cm" svg:x="68.68cm" svg:y="23.162cm">
          <draw:image xlink:href="Pictures/10000652000000B10000017AE561336A.svg" xlink:type="simple" xlink:show="embed" xlink:actuate="onLoad" draw:mime-type="image/svg+xml">
            <text:p/>
          </draw:image>
          <draw:image xlink:href="Pictures/100000010000000700000010B3F9488D.png" xlink:type="simple" xlink:show="embed" xlink:actuate="onLoad" draw:mime-type="image/png"/>
          <svg:title>TexMaths</svg:title>
          <svg:desc>300§display§\}§svg§600§TRUE§</svg:desc>
        </draw:frame>
        <draw:line draw:style-name="gr61" draw:text-style-name="P7" draw:layer="layout" svg:x1="71.455cm" svg:y1="37.23cm" svg:x2="74.93cm" svg:y2="33.02cm">
          <text:p/>
        </draw:line>
        <draw:frame draw:style-name="gr36" draw:text-style-name="P26" draw:layer="layout" svg:width="2.54cm" svg:height="1.432cm" svg:x="71.22cm" svg:y="33.828cm">
          <draw:text-box>
            <text:p>NO</text:p>
          </draw:text-box>
        </draw:frame>
        <draw:frame draw:style-name="gr6" draw:text-style-name="P7" draw:layer="layout" svg:width="34.819cm" svg:height="27.1cm" svg:x="38.535cm" svg:y="48.9cm">
          <draw:image xlink:href="Pictures/10000001000005450000041A09D30606.png" xlink:type="simple" xlink:show="embed" xlink:actuate="onLoad" draw:mime-type="image/png">
            <text:p/>
          </draw:image>
        </draw:frame>
        <draw:frame draw:style-name="gr62" draw:text-style-name="P26" draw:layer="layout" svg:width="33.02cm" svg:height="7.337cm" svg:x="38.97cm" svg:y="76.44cm">
          <draw:text-box>
            <text:p><text:span text:style-name="T23">Fig 1</text:span>: Slice plots showing the specific nuclear energy generation rate for the sub-Chandrasekhar Type-Ia SN model. <text:span text:style-name="T27">Left:</text:span> NSE evolution enabled. <text:span text:style-name="T27">Right:</text:span> With NSE evolution disabled. We successfully detects NSE within the second detonation. The energy update is not fully correct, due to missing terms in the energy update, which ended up suppressing the energy output. This issue has been fixed recently.</text:p>
          </draw:text-box>
        </draw:frame>
        <draw:frame draw:style-name="gr63" draw:text-style-name="P34" draw:layer="layout" svg:width="81.915cm" svg:height="5.715cm" svg:x="38.735cm" svg:y="43.915cm">
          <draw:text-box>
            <text:p text:style-name="P20"><text:span text:style-name="T28">Background</text:span><text:span text:style-name="T29">: </text:span><text:span text:style-name="T30">We use run</text:span><text:span text:style-name="T29"> </text:span><text:span text:style-name="T31">2-D Type Ia SN simulations of a sub-Chandrasekhar mass white dwarf with an accreted He layer and a C/O core [4]. This is a double detonation model where the detonation wave caused by He burning sends out a compression wave that eventually propagates inward and ignites the core causing a second C detonation. During the second detonation, integrating the network becomes extremely difficult as T reaches beyond 6 GK, suggesting NSE taken place. To test the NSE evolution mode, is to make sure we get approximately the same solution with NSE evolution disabled, and faster at the same time.</text:span></text:p>
          </draw:text-box>
        </draw:frame>
        <draw:frame draw:style-name="gr6" draw:text-style-name="P7" draw:layer="layout" svg:width="19.898cm" svg:height="26.891cm" svg:x="97.025cm" svg:y="49.009cm">
          <draw:image xlink:href="Pictures/100000010000047500000606EF15CB96.png" xlink:type="simple" xlink:show="embed" xlink:actuate="onLoad" draw:mime-type="image/png">
            <text:p/>
          </draw:image>
        </draw:frame>
        <draw:frame draw:style-name="gr6" draw:text-style-name="P7" draw:layer="layout" svg:width="19.387cm" svg:height="26.2cm" svg:x="74.465cm" svg:y="49.165cm">
          <draw:image xlink:href="Pictures/100000010000047500000606EBD16441.png" xlink:type="simple" xlink:show="embed" xlink:actuate="onLoad" draw:mime-type="image/png">
            <text:p/>
          </draw:image>
        </draw:frame>
        <draw:frame draw:style-name="gr64" draw:text-style-name="P35" draw:layer="layout" svg:width="19.215cm" svg:height="8.518cm" svg:x="74.13cm" svg:y="75.705cm">
          <draw:text-box>
            <text:p><text:span text:style-name="T23">Fig 2: </text:span><text:span text:style-name="T32">Ni56 Mass evolution plot in solar mass unit. <text:s/>Axis on the right shows the relative difference. At ~0.78 s, C detonation happens and we see a sharp increase in Ni56. We see that NSE evolution mode agrees well with NSE disabled.</text:span></text:p>
          </draw:text-box>
        </draw:frame>
        <draw:frame draw:style-name="gr65" draw:text-style-name="P35" draw:layer="layout" svg:width="24.26cm" svg:height="10.82cm" svg:x="95.35cm" svg:y="75.54cm">
          <draw:text-box>
            <text:p><text:span text:style-name="T23">Fig 3:</text:span><text:span text:style-name="T33"> </text:span><text:span text:style-name="T34">Node hours taken to run simulations. Before C detonation, NSE run is slower due to the NSE detection algorithm overhead. After C detonation, NSE run is slower initially, but ended up being faster after using the Jacobian-swap trick. Jacobian-swap refers to switching between numerical and analytic Jacobian during a burning-retry after integration fails. While one type of Jacobian struggles with integration, we find the other type usually solves the system instantly.</text:span></text:p>
          </draw:text-box>
        </draw:frame>
        <presentation:notes draw:style-name="dp2">
          <draw:page-thumbnail draw:style-name="gr66" draw:layer="layout" svg:width="18.624cm" svg:height="10.476cm" svg:x="1.482cm" svg:y="2.123cm" draw:page-number="1" presentation:class="page"/>
          <draw:frame presentation:style-name="pr1" draw:text-style-name="P3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67" draw:text-style-name="P6" draw:layer="layout" svg:width="121.92cm" svg:height="15.875cm" svg:x="0cm" svg:y="0cm">
          <text:p text:style-name="P5"><text:span text:style-name="T35">A</text:span><text:span text:style-name="T35">d</text:span><text:span text:style-name="T35">a</text:span><text:span text:style-name="T35">pt</text:span><text:span text:style-name="T35">iv</text:span><text:span text:style-name="T35">e </text:span><text:span text:style-name="T35">N</text:span><text:span text:style-name="T35">u</text:span><text:span text:style-name="T35">cl</text:span><text:span text:style-name="T35">e</text:span><text:span text:style-name="T35">ar </text:span><text:span text:style-name="T35">St</text:span><text:span text:style-name="T35">at</text:span><text:span text:style-name="T35">is</text:span><text:span text:style-name="T35">ti</text:span><text:span text:style-name="T35">c</text:span><text:span text:style-name="T35">al </text:span><text:span text:style-name="T35">E</text:span><text:span text:style-name="T35">q</text:span><text:span text:style-name="T35">ui</text:span><text:span text:style-name="T35">li</text:span><text:span text:style-name="T35">br</text:span><text:span text:style-name="T35">iu</text:span><text:span text:style-name="T35">m </text:span><text:span text:style-name="T35">fo</text:span><text:span text:style-name="T35">r </text:span><text:span text:style-name="T35">T</text:span><text:span text:style-name="T35">y</text:span><text:span text:style-name="T35">p</text:span><text:span text:style-name="T35">e </text:span><text:span text:style-name="T35">Ia </text:span><text:span text:style-name="T35">S</text:span><text:span text:style-name="T35">N </text:span><text:span text:style-name="T35">Si</text:span><text:span text:style-name="T35">m</text:span><text:span text:style-name="T35">ul</text:span><text:span text:style-name="T35">at</text:span><text:span text:style-name="T35">io</text:span><text:span text:style-name="T35">n</text:span></text:p>
          <text:p text:style-name="P5"><text:span text:style-name="T3"/></text:p>
          <text:p text:style-name="P5"><text:span text:style-name="T36">Zhi </text:span><text:span text:style-name="T36">Che</text:span><text:span text:style-name="T36">n</text:span><text:span text:style-name="T37">1</text:span><text:span text:style-name="T36">, </text:span><text:span text:style-name="T36">Rya</text:span><text:span text:style-name="T36">n </text:span><text:span text:style-name="T36">Bra</text:span><text:span text:style-name="T36">dy</text:span><text:span text:style-name="T37">1</text:span><text:span text:style-name="T36">, </text:span><text:span text:style-name="T36">Kha</text:span><text:span text:style-name="T36">nak </text:span><text:span text:style-name="T36">Bha</text:span><text:span text:style-name="T36">rga</text:span><text:span text:style-name="T36">va</text:span><text:span text:style-name="T37">1</text:span><text:span text:style-name="T36">, </text:span><text:span text:style-name="T36">Eric </text:span><text:span text:style-name="T36">T. </text:span><text:span text:style-name="T36">Joh</text:span><text:span text:style-name="T36">nso</text:span><text:span text:style-name="T36">n</text:span><text:span text:style-name="T37">1</text:span><text:span text:style-name="T36">, </text:span><text:span text:style-name="T36">Ale</text:span><text:span text:style-name="T36">xan</text:span><text:span text:style-name="T36">der </text:span><text:span text:style-name="T36">Smi</text:span><text:span text:style-name="T36">th </text:span><text:span text:style-name="T36">Clar</text:span><text:span text:style-name="T36">k</text:span><text:span text:style-name="T37">1</text:span><text:span text:style-name="T36">, </text:span><text:span text:style-name="T36">and </text:span><text:span text:style-name="T36">Mik</text:span><text:span text:style-name="T36">e </text:span><text:span text:style-name="T36">Zin</text:span><text:span text:style-name="T36">gale</text:span><text:span text:style-name="T37">1</text:span></text:p>
          <text:p text:style-name="P5"><text:span text:style-name="T6"/></text:p>
          <text:p text:style-name="P5"><text:span text:style-name="T5">1</text:span><text:span text:style-name="T38">Dep</text:span><text:span text:style-name="T38">artm</text:span><text:span text:style-name="T38">ent </text:span><text:span text:style-name="T38">of </text:span><text:span text:style-name="T38">Phys</text:span><text:span text:style-name="T38">ics </text:span><text:span text:style-name="T38">and </text:span><text:span text:style-name="T38">Astr</text:span><text:span text:style-name="T38">ono</text:span><text:span text:style-name="T38">my, </text:span><text:span text:style-name="T38">Ston</text:span><text:span text:style-name="T38">y </text:span><text:span text:style-name="T38">Broo</text:span><text:span text:style-name="T38">k </text:span><text:span text:style-name="T38">Univ</text:span><text:span text:style-name="T38">ersit</text:span><text:span text:style-name="T38">y, </text:span><text:span text:style-name="T38">Ston</text:span><text:span text:style-name="T38">y </text:span><text:span text:style-name="T38">Broo</text:span><text:span text:style-name="T38">k, NY </text:span><text:span text:style-name="T38">1179</text:span><text:span text:style-name="T38">4-</text:span><text:span text:style-name="T38">3800, </text:span><text:span text:style-name="T38">USA</text:span></text:p>
          <draw:enhanced-geometry svg:viewBox="0 0 21600 21600" draw:type="rectangle" draw:enhanced-path="M 0 0 L 21600 0 21600 21600 0 21600 0 0 Z N"/>
        </draw:custom-shape>
        <draw:frame draw:style-name="gr68" draw:text-style-name="P2" draw:layer="layout" svg:width="121.92cm" svg:height="4.453cm" svg:x="0cm" svg:y="86.997cm">
          <draw:image xlink:href="Pictures/1000000000000780000004DA543A29EA.jpg" xlink:type="simple" xlink:show="embed" xlink:actuate="onLoad" draw:mime-type="image/jpeg">
            <text:p/>
          </draw:image>
        </draw:frame>
        <draw:frame draw:style-name="gr8" draw:text-style-name="P10" draw:layer="layout" svg:width="86.73cm" svg:height="4.027cm" svg:x="1.935cm" svg:y="88.049cm">
          <draw:text-box>
            <text:p text:style-name="P9"><text:span text:style-name="T9">The work at Stony Brook was supported by DOE/Office of Nuclear Physics grant DE-FG02-87ER40317. </text:span></text:p>
            <text:p text:style-name="P9"><text:span text:style-name="T9">This research was supported by the Exascale Computing Project (17-SC-20-SC), a collaborative effort of the U.S. Department of Energy Office of Science and the National Nuclear Security Administration.</text:span></text:p>
          </draw:text-box>
        </draw:frame>
        <draw:frame draw:style-name="gr6" draw:text-style-name="P7" draw:layer="layout" svg:width="16.993cm" svg:height="2.794cm" svg:x="102.871cm" svg:y="87.812cm">
          <draw:image xlink:href="Pictures/10000001000004A0000000C8ACA3E62C.png" xlink:type="simple" xlink:show="embed" xlink:actuate="onLoad" draw:mime-type="image/png">
            <text:p/>
          </draw:image>
        </draw:frame>
        <draw:custom-shape draw:style-name="gr69" draw:text-style-name="P1" draw:layer="layout" svg:width="25.482cm" svg:height="31.846cm" svg:x="64.398cm" svg:y="28.5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6" draw:text-style-name="P7" draw:layer="layout" svg:width="0.001cm" svg:height="0.001cm" svg:x="60.725cm" svg:y="31.35cm">
          <draw:image xlink:href="Pictures/100065AD00000000000000000403F9E1.pdf" xlink:type="simple" xlink:show="embed" xlink:actuate="onLoad" draw:mime-type="application/pdf">
            <text:p/>
          </draw:image>
        </draw:frame>
        <draw:frame draw:style-name="gr70" draw:text-style-name="P37" draw:layer="layout" svg:width="13.294cm" svg:height="4.46cm" svg:x="70.637cm" svg:y="24.06cm">
          <draw:text-box>
            <text:p text:style-name="P23"><text:span text:style-name="T39">Enters Burner</text:span></text:p>
          </draw:text-box>
        </draw:frame>
        <draw:frame draw:style-name="gr71" draw:text-style-name="P37" draw:layer="layout" svg:width="17.726cm" svg:height="2.591cm" svg:x="68.247cm" svg:y="33.905cm">
          <draw:text-box>
            <text:p text:style-name="P23"><text:span text:style-name="T39">Min Temp Check</text:span></text:p>
          </draw:text-box>
        </draw:frame>
        <draw:frame draw:style-name="gr72" draw:text-style-name="P38" draw:layer="layout" svg:width="14.678cm" svg:height="3.875cm" svg:x="99.857cm" svg:y="41.58cm">
          <draw:text-box>
            <text:p><text:span text:style-name="T39">Burn via Integration</text:span></text:p>
          </draw:text-box>
        </draw:frame>
        <draw:custom-shape draw:style-name="gr73" draw:text-style-name="P1" draw:layer="layout" svg:width="18.834cm" svg:height="2.894cm" svg:x="67.723cm" svg:y="33.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1" draw:text-style-name="P7" draw:layer="layout" svg:x1="63.9cm" svg:y1="22.435cm" svg:x2="69.764cm" svg:y2="23.4cm">
          <text:p/>
        </draw:line>
        <draw:line draw:style-name="gr32" draw:text-style-name="P7" draw:layer="layout" svg:x1="77.17cm" svg:y1="29.548cm" svg:x2="77.17cm" svg:y2="33.408cm">
          <text:p/>
        </draw:line>
        <draw:frame draw:style-name="gr72" draw:text-style-name="P37" draw:layer="layout" svg:width="17.726cm" svg:height="3.875cm" svg:x="68.247cm" svg:y="41.124cm">
          <draw:text-box>
            <text:p text:style-name="P23"><text:span text:style-name="T39">Mass Abundance Check</text:span></text:p>
          </draw:text-box>
        </draw:frame>
        <draw:custom-shape draw:style-name="gr74" draw:text-style-name="P1" draw:layer="layout" svg:width="18.834cm" svg:height="3.919cm" svg:x="67.723cm" svg:y="40.8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77.17cm" svg:y1="37.461cm" svg:x2="77.17cm" svg:y2="40.356cm">
          <text:p/>
        </draw:line>
        <draw:frame draw:style-name="gr75" draw:text-style-name="P37" draw:layer="layout" svg:width="17.726cm" svg:height="2.896cm" svg:x="68.247cm" svg:y="49.399cm">
          <draw:text-box>
            <text:p text:style-name="P23"><text:span text:style-name="T39">NSE Grouping</text:span></text:p>
          </draw:text-box>
        </draw:frame>
        <draw:custom-shape draw:style-name="gr76" draw:text-style-name="P1" draw:layer="layout" svg:width="18.834cm" svg:height="3.2cm" svg:x="67.723cm" svg:y="49.0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77.17cm" svg:y1="45.691cm" svg:x2="77.17cm" svg:y2="48.586cm">
          <text:p/>
        </draw:line>
        <draw:frame draw:style-name="gr77" draw:text-style-name="P39" draw:layer="layout" svg:width="5.54cm" svg:height="2.286cm" svg:x="72.267cm" svg:y="30.459cm">
          <draw:text-box>
            <text:p text:style-name="P9"><text:span text:style-name="T40">YES</text:span></text:p>
          </draw:text-box>
        </draw:frame>
        <draw:frame draw:style-name="gr77" draw:text-style-name="P37" draw:layer="layout" svg:width="5.537cm" svg:height="2.286cm" svg:x="71.573cm" svg:y="37.801cm">
          <draw:text-box>
            <text:p text:style-name="P23"><text:span text:style-name="T39">YES</text:span></text:p>
          </draw:text-box>
        </draw:frame>
        <draw:frame draw:style-name="gr77" draw:text-style-name="P37" draw:layer="layout" svg:width="5.537cm" svg:height="2.286cm" svg:x="71.573cm" svg:y="46.008cm">
          <draw:text-box>
            <text:p text:style-name="P23"><text:span text:style-name="T39">YES</text:span></text:p>
          </draw:text-box>
        </draw:frame>
        <draw:frame draw:style-name="gr78" draw:text-style-name="P37" draw:layer="layout" svg:width="17.726cm" svg:height="2.895cm" svg:x="68.247cm" svg:y="56.816cm">
          <draw:text-box>
            <text:p text:style-name="P23"><text:span text:style-name="T39">Is in NSE?</text:span></text:p>
          </draw:text-box>
        </draw:frame>
        <draw:custom-shape draw:style-name="gr79" draw:text-style-name="P1" draw:layer="layout" svg:width="18.834cm" svg:height="2.952cm" svg:x="67.723cm" svg:y="56.5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77.17cm" svg:y1="53.108cm" svg:x2="77.17cm" svg:y2="56.003cm">
          <text:p/>
        </draw:line>
        <draw:frame draw:style-name="gr80" draw:text-style-name="P37" draw:layer="layout" svg:width="5.537cm" svg:height="2.288cm" svg:x="71.573cm" svg:y="53.574cm">
          <draw:text-box>
            <text:p text:style-name="P23"><text:span text:style-name="T39">YES</text:span></text:p>
          </draw:text-box>
        </draw:frame>
        <draw:frame draw:style-name="gr81" draw:text-style-name="P40" draw:layer="layout" svg:width="12.237cm" svg:height="4.294cm" svg:x="77.17cm" svg:y="29.114cm">
          <draw:text-box>
            <text:p text:style-name="P23"><text:span text:style-name="T41">NSE Check</text:span></text:p>
          </draw:text-box>
        </draw:frame>
        <draw:custom-shape draw:style-name="gr82" draw:text-style-name="P1" draw:layer="layout" svg:width="16.444cm" svg:height="4.785cm" svg:x="68.83cm" svg:y="22.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17.726cm" svg:height="5.79cm" svg:x="98.169cm" svg:y="39.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7" draw:layer="layout" svg:width="0.921cm" svg:height="1.719cm" svg:x="86.033cm" svg:y="34.375cm">
          <draw:image xlink:href="Pictures/10000652000000B10000017AE561336A.svg" xlink:type="simple" xlink:show="embed" xlink:actuate="onLoad" draw:mime-type="image/svg+xml">
            <text:p/>
          </draw:image>
          <draw:image xlink:href="Pictures/100000010000000700000010B3F9488D.png" xlink:type="simple" xlink:show="embed" xlink:actuate="onLoad" draw:mime-type="image/png"/>
          <svg:title>TexMaths</svg:title>
          <svg:desc>30§display§\}§svg§600§TRUE§</svg:desc>
        </draw:frame>
        <draw:line draw:style-name="gr46" draw:text-style-name="P7" draw:layer="layout" svg:x1="91.101cm" svg:y1="58.295cm" svg:x2="97.225cm" svg:y2="58.295cm">
          <text:p/>
        </draw:line>
        <draw:line draw:style-name="gr84" draw:text-style-name="P7" draw:layer="layout" svg:x1="93.378cm" svg:y1="42.492cm" svg:x2="97.112cm" svg:y2="42.492cm">
          <text:p/>
        </draw:line>
        <draw:frame draw:style-name="gr77" draw:text-style-name="P38" draw:layer="layout" svg:width="4.432cm" svg:height="2.286cm" svg:x="93.378cm" svg:y="39.859cm">
          <draw:text-box>
            <text:p><text:span text:style-name="T39">NO</text:span></text:p>
          </draw:text-box>
        </draw:frame>
        <draw:frame draw:style-name="gr85" draw:text-style-name="P38" draw:layer="layout" svg:width="5.54cm" svg:height="2.287cm" svg:x="91.337cm" svg:y="55.604cm">
          <draw:text-box>
            <text:p><text:span text:style-name="T39">YES</text:span></text:p>
          </draw:text-box>
        </draw:frame>
        <draw:custom-shape draw:style-name="gr86" draw:text-style-name="P42" draw:layer="layout" svg:width="17.256cm" svg:height="3.198cm" svg:x="98.454cm" svg:y="56.419cm">
          <text:p text:style-name="P41"><text:span text:style-name="T39">NSE </text:span><text:span text:style-name="T39">Burn </text:span><text:span text:style-name="T39">via </text:span><text:span text:style-name="T39">RK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9" draw:text-style-name="P7" draw:layer="layout" svg:x1="106.795cm" svg:y1="31.987cm" svg:x2="106.795cm" svg:y2="38.935cm">
          <text:p/>
        </draw:line>
        <draw:line draw:style-name="gr50" draw:text-style-name="P7" draw:layer="layout" svg:x1="106.794cm" svg:y1="32.139cm" svg:x2="85.623cm" svg:y2="32.139cm">
          <text:p/>
        </draw:line>
        <draw:frame draw:style-name="gr87" draw:text-style-name="P37" draw:layer="layout" svg:width="16.618cm" svg:height="6.302cm" svg:x="90.81cm" svg:y="25.629cm">
          <draw:text-box>
            <text:p text:style-name="P23"><text:span text:style-name="T41">Burn Failure</text:span><text:span text:style-name="T39">:</text:span></text:p>
            <text:p text:style-name="P23"><text:span text:style-name="T39">Is it because we entered NSE?</text:span></text:p>
          </draw:text-box>
        </draw:frame>
        <draw:line draw:style-name="gr54" draw:text-style-name="P7" draw:layer="layout" svg:x1="106.847cm" svg:y1="46.655cm" svg:x2="106.847cm" svg:y2="55.341cm">
          <text:p/>
        </draw:line>
        <draw:line draw:style-name="gr55" draw:text-style-name="P7" draw:layer="layout" svg:x1="106.847cm" svg:y1="50.819cm" svg:x2="117.875cm" svg:y2="50.819cm">
          <text:p/>
        </draw:line>
        <draw:frame draw:style-name="gr88" draw:text-style-name="P43" draw:layer="layout" svg:width="11.077cm" svg:height="4.189cm" svg:x="107.433cm" svg:y="46.73cm">
          <draw:text-box>
            <text:p text:style-name="P9"><text:span text:style-name="T41">Successful </text:span></text:p>
            <text:p text:style-name="P23"><text:span text:style-name="T41">Burn</text:span></text:p>
          </draw:text-box>
        </draw:frame>
        <draw:frame draw:style-name="gr6" draw:text-style-name="P7" draw:layer="layout" svg:width="9.209cm" svg:height="17.189cm" svg:x="86.557cm" svg:y="33.906cm">
          <draw:image xlink:href="Pictures/10000652000000B10000017AE561336A.svg" xlink:type="simple" xlink:show="embed" xlink:actuate="onLoad" draw:mime-type="image/svg+xml">
            <text:p/>
          </draw:image>
          <draw:image xlink:href="Pictures/100000010000000700000010B3F9488D.png" xlink:type="simple" xlink:show="embed" xlink:actuate="onLoad" draw:mime-type="image/png"/>
          <svg:title>TexMaths</svg:title>
          <svg:desc>300§display§\}§svg§600§TRUE§</svg:desc>
        </draw:frame>
        <draw:line draw:style-name="gr61" draw:text-style-name="P7" draw:layer="layout" svg:x1="91.398cm" svg:y1="55.287cm" svg:x2="97.461cm" svg:y2="48.889cm">
          <text:p/>
        </draw:line>
        <draw:frame draw:style-name="gr89" draw:text-style-name="P38" draw:layer="layout" svg:width="4.433cm" svg:height="2.285cm" svg:x="90.988cm" svg:y="50.117cm">
          <draw:text-box>
            <text:p><text:span text:style-name="T39">NO</text:span></text:p>
          </draw:text-box>
        </draw:frame>
        <draw:frame draw:style-name="gr90" draw:text-style-name="P44" draw:layer="layout" svg:width="57.785cm" svg:height="43.932cm" svg:x="1.905cm" svg:y="19.188cm">
          <draw:text-box>
            <text:p text:style-name="P20"><text:span text:style-name="T42">Motivation / Problem</text:span><text:span text:style-name="T43">:</text:span><text:span text:style-name="T44"> </text:span></text:p>
            <text:p text:style-name="P20"><text:span text:style-name="T45"><text:tab/></text:span><text:span text:style-name="T46">Challenging numerical integration of the reaction network when the system reaches nuclear statistical equilibrium (NSE) at high temperatures ( &gt; ~6 GK).</text:span></text:p>
            <text:p text:style-name="P20"><text:span text:style-name="T46"/></text:p>
            <text:p text:style-name="P20"><text:span text:style-name="T42">Solution</text:span><text:span text:style-name="T43">:</text:span></text:p>
            <text:list text:style-name="L1">
              <text:list-item>
                <text:list>
                  <text:list-item>
                    <text:p text:style-name="P20"><text:span text:style-name="T46"><text:s/>Composition in NSE has an analytic equation subject to two constraint equations. </text:span></text:p>
                  </text:list-item>
                  <text:list-item>
                    <text:p text:style-name="P20"><text:span text:style-name="T46"><text:s/>Replace numerical integration with root-finding.</text:span></text:p>
                  </text:list-item>
                </text:list>
              </text:list-item>
            </text:list>
            <text:p text:style-name="P20"><text:span text:style-name="T46"/></text:p>
            <text:p text:style-name="P20"><text:span text:style-name="T42">Steps</text:span><text:span text:style-name="T43">:</text:span><text:span text:style-name="T46"> </text:span></text:p>
            <text:p text:style-name="P20"><text:span text:style-name="T46"><text:tab/></text:span><text:span text:style-name="T46">1. NSE detection Algorithm</text:span></text:p>
            <text:p text:style-name="P20"><text:span text:style-name="T46"><text:tab/></text:span><text:span text:style-name="T46">2. Reaction Update (composition and energy)</text:span></text:p>
            <text:p text:style-name="P20"><text:span text:style-name="T46"/></text:p>
            <text:p text:style-name="P20"><text:span text:style-name="T42">Advantage</text:span><text:span text:style-name="T46">: </text:span></text:p>
            <text:p text:style-name="P20"><text:span text:style-name="T46"><text:tab/></text:span><text:span text:style-name="T46">1. Self-consistent NSE criteria</text:span></text:p>
            <text:p text:style-name="P20"><text:span text:style-name="T46"><text:tab/></text:span><text:span text:style-name="T46">2. Multi-Dimensional Simulation compatibility</text:span></text:p>
            <text:p text:style-name="P20"><text:span text:style-name="T46"><text:tab/></text:span><text:span text:style-name="T46">3. Seamless transition from integrating the network to imposing <text:s text:c="11"/>NSE due to our simplified spectral-deferred-correction (SDC) <text:s text:c="11"/>coupling hydrodynamics and reaction. </text:span></text:p>
            <text:p text:style-name="P20"><text:span text:style-name="T30"/></text:p>
          </draw:text-box>
        </draw:frame>
        <draw:custom-shape draw:style-name="gr91" draw:text-style-name="P1" draw:layer="layout" svg:width="57.378cm" svg:height="18.098cm" svg:x="61.367cm" svg:y="66.992cm">
          <text:p/>
          <draw:enhanced-geometry svg:viewBox="0 0 21600 21600" draw:mirror-horizontal="false" draw:mirror-vertical="false" draw:type="rectangle" draw:enhanced-path="M 0 0 L 21600 0 21600 21600 0 21600 0 0 Z N"/>
        </draw:custom-shape>
        <draw:custom-shape draw:style-name="gr92" draw:text-style-name="P46" draw:layer="layout" svg:width="19.536cm" svg:height="4.689cm" svg:x="80.645cm" svg:y="64.77cm">
          <text:p text:style-name="P45"><text:span text:style-name="T47">CO</text:span><text:span text:style-name="T47">DE</text:span></text:p>
          <draw:enhanced-geometry svg:viewBox="0 0 21600 21600" draw:mirror-horizontal="false" draw:mirror-vertical="false" draw:type="rectangle" draw:enhanced-path="M 0 0 L 21600 0 21600 21600 0 21600 0 0 Z N"/>
        </draw:custom-shape>
        <draw:frame draw:style-name="gr93" draw:text-style-name="P47" draw:layer="layout" svg:width="39.452cm" svg:height="8.526cm" svg:x="77.138cm" svg:y="69.035cm">
          <draw:text-box>
            <text:p text:style-name="P9"><text:span text:style-name="T48">| <text:s text:c="2"/>https://github.com/AMReX-Astro/Castro</text:span></text:p>
            <text:p text:style-name="P9"><text:span text:style-name="T48">| <text:s text:c="2"/>https://github.com/AMReX-Astro/Microphysics</text:span></text:p>
            <text:p text:style-name="P9"><text:span text:style-name="T48">| <text:s text:c="2"/>https://github.com/pynucastro/pynucastro</text:span></text:p>
          </draw:text-box>
        </draw:frame>
        <draw:frame draw:style-name="gr6" draw:text-style-name="P7" draw:layer="layout" svg:width="10.058cm" svg:height="9.07cm" svg:x="66.516cm" svg:y="74.75cm">
          <draw:image xlink:href="Pictures/10000001000001550000015DBAE51BF3.png" xlink:type="simple" xlink:show="embed" xlink:actuate="onLoad" draw:mime-type="image/png">
            <text:p/>
          </draw:image>
        </draw:frame>
        <draw:frame draw:style-name="gr94" draw:text-style-name="P48" draw:layer="layout" svg:width="35.566cm" svg:height="7.853cm" svg:x="77.431cm" svg:y="76.004cm">
          <draw:text-box>
            <text:p text:style-name="P23"><text:span text:style-name="T49">New Contributions </text:span></text:p>
            <text:p text:style-name="P23"><text:span text:style-name="T49">Are Welcome!</text:span></text:p>
          </draw:text-box>
        </draw:frame>
        <draw:frame draw:style-name="gr95" draw:text-style-name="P49" draw:layer="layout" svg:width="15.931cm" svg:height="5.715cm" svg:x="60.648cm" svg:y="69.035cm">
          <draw:text-box>
            <text:p text:style-name="P18"><text:span text:style-name="T48"><text:tab/></text:span><text:span text:style-name="T48"><text:tab/></text:span><text:span text:style-name="T48"> <text:s/>Castro</text:span></text:p>
            <text:p text:style-name="P18"><text:span text:style-name="T48">Microphysics</text:span></text:p>
            <text:p text:style-name="P18"><text:span text:style-name="T48"><text:tab/></text:span><text:span text:style-name="T48">Pynucastro</text:span></text:p>
          </draw:text-box>
        </draw:frame>
        <draw:custom-shape draw:style-name="gr96" draw:text-style-name="P1" draw:layer="layout" svg:width="57.385cm" svg:height="45.085cm" svg:x="61.36cm" svg:y="19.05cm">
          <text:p/>
          <draw:enhanced-geometry svg:viewBox="0 0 21600 21600" draw:mirror-horizontal="false" draw:mirror-vertical="false" draw:type="rectangle" draw:enhanced-path="M 0 0 L 21600 0 21600 21600 0 21600 0 0 Z N"/>
        </draw:custom-shape>
        <draw:custom-shape draw:style-name="gr97" draw:text-style-name="P51" draw:layer="layout" svg:width="40.005cm" svg:height="4.445cm" svg:x="71.52cm" svg:y="17.145cm">
          <text:p text:style-name="P50"><text:span text:style-name="T50">NS</text:span><text:span text:style-name="T50">E </text:span><text:span text:style-name="T50">EV</text:span><text:span text:style-name="T50">OL</text:span><text:span text:style-name="T50">UTI</text:span><text:span text:style-name="T50">ON </text:span><text:span text:style-name="T50">SC</text:span><text:span text:style-name="T50">HE</text:span><text:span text:style-name="T50">MA</text:span><text:span text:style-name="T50">TIC </text:span><text:span text:style-name="T50">DIA</text:span><text:span text:style-name="T50">GR</text:span><text:span text:style-name="T50">AM</text:span></text:p>
          <draw:enhanced-geometry svg:viewBox="0 0 21600 21600" draw:mirror-horizontal="false" draw:mirror-vertical="false" draw:type="rectangle" draw:enhanced-path="M 0 0 L 21600 0 21600 21600 0 21600 0 0 Z N"/>
        </draw:custom-shape>
        <draw:frame draw:style-name="gr6" draw:text-style-name="P7" draw:layer="layout" svg:width="41.846cm" svg:height="32.427cm" svg:x="45.149cm" svg:y="16.468cm">
          <draw:image xlink:href="Pictures/100000010000054B0000041AE53C378C.png" xlink:type="simple" xlink:show="embed" xlink:actuate="onLoad" draw:mime-type="image/png">
            <text:p/>
          </draw:image>
        </draw:frame>
        <draw:frame draw:style-name="gr6" draw:text-style-name="P7" draw:layer="layout" svg:width="30.105cm" svg:height="22.58cm" svg:x="24.765cm" svg:y="63.145cm">
          <draw:image xlink:href="Pictures/1000000000000FC000000BD0A5BC78A8.jpg" xlink:type="simple" xlink:show="embed" xlink:actuate="onLoad" draw:mime-type="image/jpeg">
            <text:p/>
          </draw:image>
        </draw:frame>
        <draw:line draw:style-name="gr98" draw:text-style-name="P7" draw:layer="layout" svg:x1="14.605cm" svg:y1="73.66cm" svg:x2="27.94cm" svg:y2="67.945cm">
          <text:p/>
        </draw:line>
        <draw:frame draw:style-name="gr99" draw:text-style-name="P52" draw:layer="layout" svg:width="12.065cm" svg:height="3.81cm" svg:x="1.57cm" svg:y="74.195cm">
          <draw:text-box>
            <text:p><text:span text:style-name="T51">This is me!</text:span></text:p>
          </draw:text-box>
        </draw:frame>
        <draw:custom-shape draw:style-name="gr100" draw:text-style-name="P1" draw:layer="layout" svg:width="13.335cm" svg:height="6.35cm" svg:x="0.635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6" draw:layer="layout" svg:width="18.624cm" svg:height="10.476cm" svg:x="1.482cm" svg:y="2.123cm" draw:page-number="2" presentation:class="page"/>
          <draw:frame presentation:style-name="pr2" draw:text-style-name="P3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101" draw:text-style-name="P6" draw:layer="layout" svg:width="121.92cm" svg:height="15.875cm" svg:x="0cm" svg:y="0cm">
          <text:p text:style-name="P5"><text:span text:style-name="T35">A</text:span><text:span text:style-name="T35">d</text:span><text:span text:style-name="T35">a</text:span><text:span text:style-name="T35">pt</text:span><text:span text:style-name="T35">iv</text:span><text:span text:style-name="T35">e </text:span><text:span text:style-name="T35">N</text:span><text:span text:style-name="T35">u</text:span><text:span text:style-name="T35">cl</text:span><text:span text:style-name="T35">e</text:span><text:span text:style-name="T35">ar </text:span><text:span text:style-name="T35">St</text:span><text:span text:style-name="T35">at</text:span><text:span text:style-name="T35">is</text:span><text:span text:style-name="T35">ti</text:span><text:span text:style-name="T35">c</text:span><text:span text:style-name="T35">al </text:span><text:span text:style-name="T35">E</text:span><text:span text:style-name="T35">q</text:span><text:span text:style-name="T35">ui</text:span><text:span text:style-name="T35">li</text:span><text:span text:style-name="T35">br</text:span><text:span text:style-name="T35">iu</text:span><text:span text:style-name="T35">m </text:span><text:span text:style-name="T35">fo</text:span><text:span text:style-name="T35">r </text:span><text:span text:style-name="T35">T</text:span><text:span text:style-name="T35">y</text:span><text:span text:style-name="T35">p</text:span><text:span text:style-name="T35">e </text:span><text:span text:style-name="T35">Ia </text:span><text:span text:style-name="T35">S</text:span><text:span text:style-name="T35">N </text:span><text:span text:style-name="T35">Si</text:span><text:span text:style-name="T35">m</text:span><text:span text:style-name="T35">ul</text:span><text:span text:style-name="T35">at</text:span><text:span text:style-name="T35">io</text:span><text:span text:style-name="T35">n</text:span></text:p>
          <text:p text:style-name="P5"><text:span text:style-name="T3"/></text:p>
          <text:p text:style-name="P5"><text:span text:style-name="T36">Zhi </text:span><text:span text:style-name="T36">Che</text:span><text:span text:style-name="T36">n</text:span><text:span text:style-name="T37">1</text:span><text:span text:style-name="T36">, </text:span><text:span text:style-name="T36">Rya</text:span><text:span text:style-name="T36">n </text:span><text:span text:style-name="T36">Bra</text:span><text:span text:style-name="T36">dy</text:span><text:span text:style-name="T37">1</text:span><text:span text:style-name="T36">, </text:span><text:span text:style-name="T36">Kha</text:span><text:span text:style-name="T36">nak </text:span><text:span text:style-name="T36">Bha</text:span><text:span text:style-name="T36">rga</text:span><text:span text:style-name="T36">va</text:span><text:span text:style-name="T37">1</text:span><text:span text:style-name="T36">, </text:span><text:span text:style-name="T36">Eric </text:span><text:span text:style-name="T36">T. </text:span><text:span text:style-name="T36">Joh</text:span><text:span text:style-name="T36">nso</text:span><text:span text:style-name="T36">n</text:span><text:span text:style-name="T37">1</text:span><text:span text:style-name="T36">, </text:span><text:span text:style-name="T36">Ale</text:span><text:span text:style-name="T36">xan</text:span><text:span text:style-name="T36">der </text:span><text:span text:style-name="T36">Smi</text:span><text:span text:style-name="T36">th </text:span><text:span text:style-name="T36">Clar</text:span><text:span text:style-name="T36">k</text:span><text:span text:style-name="T37">1</text:span><text:span text:style-name="T36">, </text:span><text:span text:style-name="T36">and </text:span><text:span text:style-name="T36">Mik</text:span><text:span text:style-name="T36">e </text:span><text:span text:style-name="T36">Zin</text:span><text:span text:style-name="T36">gale</text:span><text:span text:style-name="T37">1</text:span></text:p>
          <text:p text:style-name="P5"><text:span text:style-name="T6"/></text:p>
          <text:p text:style-name="P5"><text:span text:style-name="T5">1</text:span><text:span text:style-name="T38">Dep</text:span><text:span text:style-name="T38">artm</text:span><text:span text:style-name="T38">ent </text:span><text:span text:style-name="T38">of </text:span><text:span text:style-name="T38">Phys</text:span><text:span text:style-name="T38">ics </text:span><text:span text:style-name="T38">and </text:span><text:span text:style-name="T38">Astr</text:span><text:span text:style-name="T38">ono</text:span><text:span text:style-name="T38">my, </text:span><text:span text:style-name="T38">Ston</text:span><text:span text:style-name="T38">y </text:span><text:span text:style-name="T38">Broo</text:span><text:span text:style-name="T38">k </text:span><text:span text:style-name="T38">Univ</text:span><text:span text:style-name="T38">ersit</text:span><text:span text:style-name="T38">y, </text:span><text:span text:style-name="T38">Ston</text:span><text:span text:style-name="T38">y </text:span><text:span text:style-name="T38">Broo</text:span><text:span text:style-name="T38">k, NY </text:span><text:span text:style-name="T38">1179</text:span><text:span text:style-name="T38">4-</text:span><text:span text:style-name="T38">3800, </text:span><text:span text:style-name="T38">USA</text:span></text:p>
          <draw:enhanced-geometry svg:viewBox="0 0 21600 21600" draw:type="rectangle" draw:enhanced-path="M 0 0 L 21600 0 21600 21600 0 21600 0 0 Z N"/>
        </draw:custom-shape>
        <draw:frame draw:style-name="gr102" draw:text-style-name="P2" draw:layer="layout" svg:width="121.92cm" svg:height="4.453cm" svg:x="0cm" svg:y="86.997cm">
          <draw:image xlink:href="Pictures/1000000000000780000004DA543A29EA.jpg" xlink:type="simple" xlink:show="embed" xlink:actuate="onLoad" draw:mime-type="image/jpeg">
            <text:p/>
          </draw:image>
        </draw:frame>
        <draw:frame draw:style-name="gr8" draw:text-style-name="P10" draw:layer="layout" svg:width="86.73cm" svg:height="4.027cm" svg:x="1.935cm" svg:y="88.049cm">
          <draw:text-box>
            <text:p text:style-name="P9"><text:span text:style-name="T9">The work </text:span><text:span text:style-name="T9">at Stony </text:span><text:span text:style-name="T9">Brook </text:span><text:span text:style-name="T9">was </text:span><text:span text:style-name="T9">supporte</text:span><text:span text:style-name="T9">d by </text:span><text:span text:style-name="T9">DOE/Offi</text:span><text:span text:style-name="T9">ce of </text:span><text:span text:style-name="T9">Nuclear </text:span><text:span text:style-name="T9">Physics </text:span><text:span text:style-name="T9">grant DE-</text:span><text:span text:style-name="T9">FG02-</text:span><text:span text:style-name="T9">87ER403</text:span><text:span text:style-name="T9">17. </text:span></text:p>
            <text:p text:style-name="P9"><text:span text:style-name="T9">This </text:span><text:span text:style-name="T9">research </text:span><text:span text:style-name="T9">was </text:span><text:span text:style-name="T9">supporte</text:span><text:span text:style-name="T9">d by the </text:span><text:span text:style-name="T9">Exascale </text:span><text:span text:style-name="T9">Computin</text:span><text:span text:style-name="T9">g Project </text:span><text:span text:style-name="T9">(17-</text:span><text:span text:style-name="T9">SC-20-</text:span><text:span text:style-name="T9">SC), a </text:span><text:span text:style-name="T9">collaborat</text:span><text:span text:style-name="T9">ive effort </text:span><text:span text:style-name="T9">of the </text:span><text:span text:style-name="T9">U.S. </text:span><text:span text:style-name="T9">Departm</text:span><text:span text:style-name="T9">ent of </text:span><text:span text:style-name="T9">Energy </text:span><text:span text:style-name="T9">Office of </text:span><text:span text:style-name="T9">Science </text:span><text:span text:style-name="T9">and the </text:span><text:span text:style-name="T9">National </text:span><text:span text:style-name="T9">Nuclear </text:span><text:span text:style-name="T9">Security </text:span><text:span text:style-name="T9">Administr</text:span><text:span text:style-name="T9">ation.</text:span></text:p>
          </draw:text-box>
        </draw:frame>
        <draw:frame draw:style-name="gr6" draw:text-style-name="P7" draw:layer="layout" svg:width="16.993cm" svg:height="2.794cm" svg:x="102.871cm" svg:y="87.812cm">
          <draw:image xlink:href="Pictures/10000001000004A0000000C8ACA3E62C.png" xlink:type="simple" xlink:show="embed" xlink:actuate="onLoad" draw:mime-type="image/png">
            <text:p/>
          </draw:image>
        </draw:frame>
        <draw:custom-shape draw:style-name="gr69" draw:text-style-name="P1" draw:layer="layout" svg:width="25.482cm" svg:height="31.846cm" svg:x="5.478cm" svg:y="28.7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6" draw:text-style-name="P7" draw:layer="layout" svg:width="0.001cm" svg:height="0.001cm" svg:x="1.805cm" svg:y="31.48cm">
          <draw:image xlink:href="Pictures/100065AD00000000000000000403F9E1.pdf" xlink:type="simple" xlink:show="embed" xlink:actuate="onLoad" draw:mime-type="application/pdf">
            <text:p/>
          </draw:image>
        </draw:frame>
        <draw:frame draw:style-name="gr70" draw:text-style-name="P37" draw:layer="layout" svg:width="13.294cm" svg:height="4.46cm" svg:x="11.717cm" svg:y="24.19cm">
          <draw:text-box>
            <text:p text:style-name="P23"><text:span text:style-name="T39">Ente</text:span><text:span text:style-name="T39">rs </text:span><text:span text:style-name="T39">Burn</text:span><text:span text:style-name="T39">er</text:span></text:p>
          </draw:text-box>
        </draw:frame>
        <draw:frame draw:style-name="gr71" draw:text-style-name="P37" draw:layer="layout" svg:width="17.726cm" svg:height="2.591cm" svg:x="9.327cm" svg:y="34.035cm">
          <draw:text-box>
            <text:p text:style-name="P23"><text:span text:style-name="T39">Min </text:span><text:span text:style-name="T39">Tem</text:span><text:span text:style-name="T39">p </text:span><text:span text:style-name="T39">Che</text:span><text:span text:style-name="T39">ck</text:span></text:p>
          </draw:text-box>
        </draw:frame>
        <draw:frame draw:style-name="gr72" draw:text-style-name="P38" draw:layer="layout" svg:width="14.678cm" svg:height="3.875cm" svg:x="40.937cm" svg:y="41.71cm">
          <draw:text-box>
            <text:p><text:span text:style-name="T39">Burn </text:span><text:span text:style-name="T39">via </text:span><text:span text:style-name="T39">Integ</text:span><text:span text:style-name="T39">ratio</text:span><text:span text:style-name="T39">n</text:span></text:p>
          </draw:text-box>
        </draw:frame>
        <draw:custom-shape draw:style-name="gr73" draw:text-style-name="P1" draw:layer="layout" svg:width="18.834cm" svg:height="2.894cm" svg:x="8.803cm" svg:y="33.73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1" draw:text-style-name="P7" draw:layer="layout" svg:x1="4.98cm" svg:y1="22.565cm" svg:x2="10.844cm" svg:y2="23.53cm">
          <text:p/>
        </draw:line>
        <draw:line draw:style-name="gr32" draw:text-style-name="P7" draw:layer="layout" svg:x1="18.25cm" svg:y1="29.678cm" svg:x2="18.25cm" svg:y2="33.538cm">
          <text:p/>
        </draw:line>
        <draw:frame draw:style-name="gr72" draw:text-style-name="P37" draw:layer="layout" svg:width="17.726cm" svg:height="3.875cm" svg:x="9.327cm" svg:y="41.254cm">
          <draw:text-box>
            <text:p text:style-name="P23"><text:span text:style-name="T39">Mass </text:span><text:span text:style-name="T39">Abunda</text:span><text:span text:style-name="T39">nce </text:span><text:span text:style-name="T39">Check</text:span></text:p>
          </draw:text-box>
        </draw:frame>
        <draw:custom-shape draw:style-name="gr74" draw:text-style-name="P1" draw:layer="layout" svg:width="18.834cm" svg:height="3.919cm" svg:x="8.803cm" svg:y="40.9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18.25cm" svg:y1="37.591cm" svg:x2="18.25cm" svg:y2="40.486cm">
          <text:p/>
        </draw:line>
        <draw:frame draw:style-name="gr75" draw:text-style-name="P37" draw:layer="layout" svg:width="17.726cm" svg:height="2.896cm" svg:x="9.327cm" svg:y="49.529cm">
          <draw:text-box>
            <text:p text:style-name="P23"><text:span text:style-name="T39">NSE </text:span><text:span text:style-name="T39">Grouping</text:span></text:p>
          </draw:text-box>
        </draw:frame>
        <draw:custom-shape draw:style-name="gr76" draw:text-style-name="P1" draw:layer="layout" svg:width="18.834cm" svg:height="3.2cm" svg:x="8.803cm" svg:y="49.2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18.25cm" svg:y1="45.821cm" svg:x2="18.25cm" svg:y2="48.716cm">
          <text:p/>
        </draw:line>
        <draw:frame draw:style-name="gr77" draw:text-style-name="P39" draw:layer="layout" svg:width="5.54cm" svg:height="2.286cm" svg:x="13.347cm" svg:y="30.589cm">
          <draw:text-box>
            <text:p text:style-name="P9"><text:span text:style-name="T40">YES</text:span></text:p>
          </draw:text-box>
        </draw:frame>
        <draw:frame draw:style-name="gr77" draw:text-style-name="P37" draw:layer="layout" svg:width="5.537cm" svg:height="2.286cm" svg:x="12.653cm" svg:y="37.931cm">
          <draw:text-box>
            <text:p text:style-name="P23"><text:span text:style-name="T39">YES</text:span></text:p>
          </draw:text-box>
        </draw:frame>
        <draw:frame draw:style-name="gr77" draw:text-style-name="P37" draw:layer="layout" svg:width="5.537cm" svg:height="2.286cm" svg:x="12.653cm" svg:y="46.138cm">
          <draw:text-box>
            <text:p text:style-name="P23"><text:span text:style-name="T39">YES</text:span></text:p>
          </draw:text-box>
        </draw:frame>
        <draw:frame draw:style-name="gr78" draw:text-style-name="P37" draw:layer="layout" svg:width="17.726cm" svg:height="2.895cm" svg:x="9.327cm" svg:y="56.946cm">
          <draw:text-box>
            <text:p text:style-name="P23"><text:span text:style-name="T39">Is in </text:span><text:span text:style-name="T39">NSE?</text:span></text:p>
          </draw:text-box>
        </draw:frame>
        <draw:custom-shape draw:style-name="gr79" draw:text-style-name="P1" draw:layer="layout" svg:width="18.834cm" svg:height="2.952cm" svg:x="8.803cm" svg:y="56.6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2" draw:text-style-name="P7" draw:layer="layout" svg:x1="18.25cm" svg:y1="53.238cm" svg:x2="18.25cm" svg:y2="56.133cm">
          <text:p/>
        </draw:line>
        <draw:frame draw:style-name="gr80" draw:text-style-name="P37" draw:layer="layout" svg:width="5.537cm" svg:height="2.288cm" svg:x="12.653cm" svg:y="53.704cm">
          <draw:text-box>
            <text:p text:style-name="P23"><text:span text:style-name="T39">YE</text:span><text:span text:style-name="T39">S</text:span></text:p>
          </draw:text-box>
        </draw:frame>
        <draw:frame draw:style-name="gr81" draw:text-style-name="P40" draw:layer="layout" svg:width="12.237cm" svg:height="4.294cm" svg:x="18.25cm" svg:y="29.244cm">
          <draw:text-box>
            <text:p text:style-name="P23"><text:span text:style-name="T41">NS</text:span><text:span text:style-name="T41">E </text:span><text:span text:style-name="T41">Ch</text:span><text:span text:style-name="T41">ec</text:span><text:span text:style-name="T41">k</text:span></text:p>
          </draw:text-box>
        </draw:frame>
        <draw:custom-shape draw:style-name="gr82" draw:text-style-name="P1" draw:layer="layout" svg:width="16.444cm" svg:height="4.785cm" svg:x="9.91cm" svg:y="22.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17.726cm" svg:height="5.79cm" svg:x="39.249cm" svg:y="39.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6" draw:text-style-name="P7" draw:layer="layout" svg:x1="32.181cm" svg:y1="58.425cm" svg:x2="38.305cm" svg:y2="58.425cm">
          <text:p/>
        </draw:line>
        <draw:line draw:style-name="gr84" draw:text-style-name="P7" draw:layer="layout" svg:x1="34.458cm" svg:y1="42.622cm" svg:x2="38.192cm" svg:y2="42.622cm">
          <text:p/>
        </draw:line>
        <draw:frame draw:style-name="gr77" draw:text-style-name="P38" draw:layer="layout" svg:width="4.432cm" svg:height="2.286cm" svg:x="34.458cm" svg:y="39.989cm">
          <draw:text-box>
            <text:p><text:span text:style-name="T39">NO</text:span></text:p>
          </draw:text-box>
        </draw:frame>
        <draw:frame draw:style-name="gr85" draw:text-style-name="P38" draw:layer="layout" svg:width="5.54cm" svg:height="2.287cm" svg:x="32.417cm" svg:y="55.734cm">
          <draw:text-box>
            <text:p><text:span text:style-name="T39">YES</text:span></text:p>
          </draw:text-box>
        </draw:frame>
        <draw:custom-shape draw:style-name="gr86" draw:text-style-name="P42" draw:layer="layout" svg:width="17.256cm" svg:height="3.198cm" svg:x="39.534cm" svg:y="56.549cm">
          <text:p text:style-name="P41"><text:span text:style-name="T39">NSE Burn via RK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9" draw:text-style-name="P7" draw:layer="layout" svg:x1="47.875cm" svg:y1="32.117cm" svg:x2="47.875cm" svg:y2="39.065cm">
          <text:p/>
        </draw:line>
        <draw:line draw:style-name="gr50" draw:text-style-name="P7" draw:layer="layout" svg:x1="47.874cm" svg:y1="32.269cm" svg:x2="26.703cm" svg:y2="32.269cm">
          <text:p/>
        </draw:line>
        <draw:frame draw:style-name="gr87" draw:text-style-name="P37" draw:layer="layout" svg:width="16.618cm" svg:height="6.302cm" svg:x="31.007cm" svg:y="27.988cm">
          <draw:text-box>
            <text:p text:style-name="P23"><text:span text:style-name="T39">By the end of a integration step</text:span></text:p>
          </draw:text-box>
        </draw:frame>
        <draw:line draw:style-name="gr54" draw:text-style-name="P7" draw:layer="layout" svg:x1="47.927cm" svg:y1="46.785cm" svg:x2="47.927cm" svg:y2="55.471cm">
          <text:p/>
        </draw:line>
        <draw:line draw:style-name="gr55" draw:text-style-name="P7" draw:layer="layout" svg:x1="47.927cm" svg:y1="50.949cm" svg:x2="58.955cm" svg:y2="50.949cm">
          <text:p/>
        </draw:line>
        <draw:frame draw:style-name="gr88" draw:text-style-name="P43" draw:layer="layout" svg:width="11.077cm" svg:height="4.189cm" svg:x="48.513cm" svg:y="46.86cm">
          <draw:text-box>
            <text:p text:style-name="P9"><text:span text:style-name="T41">Successful </text:span></text:p>
            <text:p text:style-name="P23"><text:span text:style-name="T41">Burn</text:span></text:p>
          </draw:text-box>
        </draw:frame>
        <draw:frame draw:style-name="gr6" draw:text-style-name="P7" draw:layer="layout" svg:width="9.209cm" svg:height="17.189cm" svg:x="27.637cm" svg:y="34.036cm">
          <draw:image xlink:href="Pictures/10000652000000B10000017AE561336A.svg" xlink:type="simple" xlink:show="embed" xlink:actuate="onLoad" draw:mime-type="image/svg+xml">
            <text:p/>
          </draw:image>
          <draw:image xlink:href="Pictures/100000010000000700000010B3F9488D.png" xlink:type="simple" xlink:show="embed" xlink:actuate="onLoad" draw:mime-type="image/png"/>
          <svg:title>TexMaths</svg:title>
          <svg:desc>300§display§\}§svg§600§TRUE§</svg:desc>
        </draw:frame>
        <draw:line draw:style-name="gr61" draw:text-style-name="P7" draw:layer="layout" svg:x1="32.478cm" svg:y1="55.417cm" svg:x2="38.541cm" svg:y2="49.019cm">
          <text:p/>
        </draw:line>
        <draw:frame draw:style-name="gr89" draw:text-style-name="P38" draw:layer="layout" svg:width="4.433cm" svg:height="2.285cm" svg:x="32.068cm" svg:y="50.247cm">
          <draw:text-box>
            <text:p><text:span text:style-name="T39">NO</text:span></text:p>
          </draw:text-box>
        </draw:frame>
        <draw:custom-shape draw:style-name="gr103" draw:text-style-name="P1" draw:layer="layout" svg:width="55.778cm" svg:height="18.098cm" svg:x="62.967cm" svg:y="67.092cm">
          <text:p/>
          <draw:enhanced-geometry svg:viewBox="0 0 21600 21600" draw:mirror-horizontal="false" draw:mirror-vertical="false" draw:type="rectangle" draw:enhanced-path="M 0 0 L 21600 0 21600 21600 0 21600 0 0 Z N"/>
        </draw:custom-shape>
        <draw:custom-shape draw:style-name="gr92" draw:text-style-name="P46" draw:layer="layout" svg:width="19.536cm" svg:height="4.689cm" svg:x="82.145cm" svg:y="64.77cm">
          <text:p text:style-name="P45"><text:span text:style-name="T47">CODE</text:span></text:p>
          <draw:enhanced-geometry svg:viewBox="0 0 21600 21600" draw:mirror-horizontal="false" draw:mirror-vertical="false" draw:type="rectangle" draw:enhanced-path="M 0 0 L 21600 0 21600 21600 0 21600 0 0 Z N"/>
        </draw:custom-shape>
        <draw:frame draw:style-name="gr93" draw:text-style-name="P47" draw:layer="layout" svg:width="39.452cm" svg:height="8.526cm" svg:x="78.738cm" svg:y="69.135cm">
          <draw:text-box>
            <text:p text:style-name="P9"><text:span text:style-name="T48">| <text:s text:c="2"/>https://github.com/AMReX-Astro/Castro</text:span></text:p>
            <text:p text:style-name="P9"><text:span text:style-name="T48">| <text:s text:c="2"/>https://github.com/AMReX-Astro/Microphysics</text:span></text:p>
            <text:p text:style-name="P9"><text:span text:style-name="T48">| <text:s text:c="2"/>https://github.com/pynucastro/pynucastro</text:span></text:p>
          </draw:text-box>
        </draw:frame>
        <draw:frame draw:style-name="gr6" draw:text-style-name="P7" draw:layer="layout" svg:width="11.466cm" svg:height="10.34cm" svg:x="68.116cm" svg:y="74.65cm">
          <draw:image xlink:href="Pictures/10000001000001550000015DBAE51BF3.png" xlink:type="simple" xlink:show="embed" xlink:actuate="onLoad" draw:mime-type="image/png">
            <text:p/>
          </draw:image>
        </draw:frame>
        <draw:frame draw:style-name="gr94" draw:text-style-name="P48" draw:layer="layout" svg:width="35.566cm" svg:height="7.853cm" svg:x="79.031cm" svg:y="76.404cm">
          <draw:text-box>
            <text:p text:style-name="P23"><text:span text:style-name="T49">New Contributions </text:span></text:p>
            <text:p text:style-name="P23"><text:span text:style-name="T49">Are Welcome!</text:span></text:p>
          </draw:text-box>
        </draw:frame>
        <draw:frame draw:style-name="gr95" draw:text-style-name="P49" draw:layer="layout" svg:width="15.931cm" svg:height="5.715cm" svg:x="62.248cm" svg:y="69.135cm">
          <draw:text-box>
            <text:p text:style-name="P18"><text:span text:style-name="T48"><text:tab/></text:span><text:span text:style-name="T48"><text:tab/></text:span><text:span text:style-name="T48"> <text:s/>Castro</text:span></text:p>
            <text:p text:style-name="P18"><text:span text:style-name="T48">Microphysics</text:span></text:p>
            <text:p text:style-name="P18"><text:span text:style-name="T48"><text:tab/></text:span><text:span text:style-name="T48">Pynucastro</text:span></text:p>
          </draw:text-box>
        </draw:frame>
        <draw:custom-shape draw:style-name="gr96" draw:text-style-name="P1" draw:layer="layout" svg:width="57.385cm" svg:height="45.085cm" svg:x="2.44cm" svg:y="19.18cm">
          <text:p/>
          <draw:enhanced-geometry svg:viewBox="0 0 21600 21600" draw:mirror-horizontal="false" draw:mirror-vertical="false" draw:type="rectangle" draw:enhanced-path="M 0 0 L 21600 0 21600 21600 0 21600 0 0 Z N"/>
        </draw:custom-shape>
        <draw:custom-shape draw:style-name="gr104" draw:text-style-name="P51" draw:layer="layout" svg:width="40.005cm" svg:height="4.445cm" svg:x="12.6cm" svg:y="17.275cm">
          <text:p text:style-name="P50"><text:span text:style-name="T50">NSE EVOLUTION SCHEMATIC DIAGRAM</text:span></text:p>
          <draw:enhanced-geometry svg:viewBox="0 0 21600 21600" draw:mirror-horizontal="false" draw:mirror-vertical="false" draw:type="rectangle" draw:enhanced-path="M 0 0 L 21600 0 21600 21600 0 21600 0 0 Z N"/>
        </draw:custom-shape>
        <draw:frame draw:style-name="gr6" draw:text-style-name="P7" draw:layer="layout" svg:width="59.054cm" svg:height="45.762cm" svg:x="61.595cm" svg:y="18.415cm">
          <draw:image xlink:href="Pictures/100000010000054B0000041AE53C378C.png" xlink:type="simple" xlink:show="embed" xlink:actuate="onLoad" draw:mime-type="image/png">
            <text:p/>
          </draw:image>
        </draw:frame>
        <draw:frame draw:style-name="gr6" draw:text-style-name="P7" draw:layer="layout" svg:width="25.4cm" svg:height="19.051cm" svg:x="27.305cm" svg:y="66.674cm">
          <draw:image xlink:href="Pictures/1000000000000FC000000BD0A5BC78A8.jpg" xlink:type="simple" xlink:show="embed" xlink:actuate="onLoad" draw:mime-type="image/jpeg">
            <text:p/>
          </draw:image>
        </draw:frame>
        <draw:line draw:style-name="gr98" draw:text-style-name="P7" draw:layer="layout" svg:x1="15.875cm" svg:y1="74.19cm" svg:x2="28.575cm" svg:y2="70.485cm">
          <text:p/>
        </draw:line>
        <draw:frame draw:style-name="gr99" draw:text-style-name="P52" draw:layer="layout" svg:width="12.065cm" svg:height="3.81cm" svg:x="4.77cm" svg:y="75.995cm">
          <draw:text-box>
            <text:p><text:span text:style-name="T51">This is me!</text:span></text:p>
          </draw:text-box>
        </draw:frame>
        <draw:custom-shape draw:style-name="gr100" draw:text-style-name="P1" draw:layer="layout" svg:width="13.335cm" svg:height="6.35cm" svg:x="3.835cm" svg:y="74.1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6" draw:layer="layout" svg:width="18.624cm" svg:height="10.476cm" svg:x="1.482cm" svg:y="2.123cm" draw:page-number="3" presentation:class="page"/>
          <draw:frame presentation:style-name="pr2" draw:text-style-name="P3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3" draw:display-name="Gradient 23" draw:style="linear" draw:start-color="#990000" draw:end-color="#6b000d" draw:start-intensity="100%" draw:end-intensity="100%" draw:angle="15deg" draw:border="0%">
      <loext:gradient-stop svg:offset="0" loext:color-type="rgb" loext:color-value="#990000"/>
      <loext:gradient-stop svg:offset="1" loext:color-type="rgb" loext:color-value="#6b000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Square" svg:viewBox="0 0 10 10" svg:d="M0 0h10v10h-10z"/>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Dot_20__28_Rounded_29_" draw:display-name="Long Dash Dot (Rounded)" draw:style="round" draw:dots1="1" draw:dots1-length="301%" draw:dots2="1" draw:dots2-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loext:fill-use-slide-background="false" draw:opacity="100%" draw:textarea-horizontal-align="justify" fo:padding-top="0.125cm" fo:padding-bottom="0.125cm" fo:padding-left="0.25cm" fo:padding-right="0.25cm" fo:wrap-option="wrap"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eal-banded" style:family="table-cell" style:parent-style-name="default">
      <loext:graphic-properties draw:fill="solid" draw:fill-color="#b3cac7"/>
    </style:style>
    <style:style style:name="teal-normal" style:family="table-cell" style:parent-style-name="default">
      <loext:graphic-properties draw:fill="solid" draw:fill-color="#dee7e5"/>
    </style:style>
    <style:style style:name="teal-title" style:family="table-cell" style:parent-style-name="default">
      <loext:graphic-properties draw:fill="solid" draw:fill-color="#50938a"/>
      <style:text-properties fo:color="#ffffff" loext:opacity="100%"/>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teal-dark">
      <table:first-row table:style-name="teal-title"/>
      <table:last-row table:style-name="teal-title"/>
      <table:first-column table:style-name="teal-title"/>
      <table:last-column table:style-name="teal-title"/>
      <table:body table:style-name="teal-normal"/>
      <table:odd-rows table:style-name="teal-banded"/>
      <table:odd-columns table:style-name="teal-banded"/>
    </table:table-templat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5.6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319cm" fo:margin-bottom="0cm" fo:text-indent="0cm"/>
      <style:text-properties fo:font-size="162.5pt" style:font-size-asian="28pt" style:font-size-complex="28pt"/>
    </style:style>
    <style:style style:name="Default-outline3" style:family="presentation" style:parent-style-name="Default-outline2">
      <style:paragraph-properties fo:margin-left="0cm" fo:margin-right="0cm" fo:margin-top="1.739cm" fo:margin-bottom="0cm" fo:text-indent="0cm"/>
      <style:text-properties fo:font-size="139.399993896484pt" style:font-size-asian="24pt" style:font-size-complex="24pt"/>
    </style:style>
    <style:style style:name="Default-outline4" style:family="presentation" style:parent-style-name="Default-outline3">
      <style:paragraph-properties fo:margin-left="0cm" fo:margin-right="0cm" fo:margin-top="1.157cm" fo:margin-bottom="0cm" fo:text-indent="0cm"/>
      <style:text-properties fo:font-size="116.099998474121pt" style:font-size-asian="20pt" style:font-size-complex="20pt"/>
    </style:style>
    <style:style style:name="Default-outline5" style:family="presentation" style:parent-style-name="Default-outline4">
      <style:paragraph-properties fo:margin-left="0cm" fo:margin-right="0cm" fo:margin-top="0.578cm" fo:margin-bottom="0cm" fo:text-indent="0cm"/>
      <style:text-properties fo:font-size="116.099998474121pt" style:font-size-asian="20pt" style:font-size-complex="20pt"/>
    </style:style>
    <style:style style:name="Default-outline6" style:family="presentation" style:parent-style-name="Default-outline5">
      <style:paragraph-properties fo:margin-left="0cm" fo:margin-right="0cm" fo:margin-top="0.578cm" fo:margin-bottom="0cm" fo:text-indent="0cm"/>
      <style:text-properties fo:font-size="116.099998474121pt" style:font-size-asian="20pt" style:font-size-complex="20pt"/>
    </style:style>
    <style:style style:name="Default-outline7" style:family="presentation" style:parent-style-name="Default-outline6">
      <style:paragraph-properties fo:margin-left="0cm" fo:margin-right="0cm" fo:margin-top="0.578cm" fo:margin-bottom="0cm" fo:text-indent="0cm"/>
      <style:text-properties fo:font-size="116.099998474121pt" style:font-size-asian="20pt" style:font-size-complex="20pt"/>
    </style:style>
    <style:style style:name="Default-outline8" style:family="presentation" style:parent-style-name="Default-outline7">
      <style:paragraph-properties fo:margin-left="0cm" fo:margin-right="0cm" fo:margin-top="0.578cm" fo:margin-bottom="0cm" fo:text-indent="0cm"/>
      <style:text-properties fo:font-size="116.099998474121pt" style:font-size-asian="20pt" style:font-size-complex="20pt"/>
    </style:style>
    <style:style style:name="Default-outline9" style:family="presentation" style:parent-style-name="Default-outline8">
      <style:paragraph-properties fo:margin-left="0cm" fo:margin-right="0cm" fo:margin-top="0.578cm" fo:margin-bottom="0cm" fo:text-indent="0cm"/>
      <style:text-properties fo:font-size="116.09999847412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55.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09.724cm" svg:height="15.262cm" svg:x="6.096cm" svg:y="3.643cm" presentation:class="title" presentation:placeholder="true">
        <draw:text-box/>
      </draw:frame>
      <draw:frame presentation:style-name="Default-outline1" draw:layer="backgroundobjects" svg:width="109.724cm" svg:height="53.029cm" svg:x="6.096cm" svg:y="21.392cm" presentation:class="outline" presentation:placeholder="true">
        <draw:text-box/>
      </draw:frame>
      <draw:frame presentation:style-name="Mpr1" draw:text-style-name="MP2" draw:layer="backgroundobjects" svg:width="28.403cm" svg:height="6.299cm" svg:x="6.096cm" svg:y="83.299cm" presentation:class="date-time">
        <draw:text-box>
          <text:p text:style-name="MP1"><text:span text:style-name="MT1"><presentation:date-time/></text:span></text:p>
        </draw:text-box>
      </draw:frame>
      <draw:frame presentation:style-name="Mpr1" draw:text-style-name="MP6" draw:layer="backgroundobjects" svg:width="38.645cm" svg:height="6.299cm" svg:x="41.695cm" svg:y="83.299cm" presentation:class="footer">
        <draw:text-box>
          <text:p text:style-name="MP5"><text:span text:style-name="MT1"><presentation:footer/></text:span></text:p>
        </draw:text-box>
      </draw:frame>
      <draw:frame presentation:style-name="Mpr1" draw:text-style-name="MP4" draw:layer="backgroundobjects" svg:width="28.403cm" svg:height="6.299cm" svg:x="87.415cm" svg:y="83.2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6-08T20:51:03.324815988</meta:creation-date>
    <dc:date>2025-11-11T16:56:34.952555906</dc:date>
    <meta:editing-duration>P6DT23H10M47S</meta:editing-duration>
    <meta:editing-cycles>56</meta:editing-cycles>
    <meta:generator>LibreOffice/25.2.7.2$Linux_X86_64 LibreOffice_project/520$Build-2</meta:generator>
    <meta:print-date>2024-08-05T16:10:53.063482611</meta:print-date>
    <meta:printed-by>PDF files</meta:printed-by>
    <meta:document-statistic meta:object-count="246"/>
  </office:meta>
</office:document-meta>
</file>